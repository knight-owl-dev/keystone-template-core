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 fo:text-align="justify" fo:text-indent="0.33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text-indent="0i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Centered" style:family="paragraph" style:parent-style-name="Text_20_body" style:next-style-name="Text_20_body">
      <style:paragraph-properties fo:text-align="center"/>
    </style:style>
    <style:style style:name="AlignRight" style:family="paragraph" style:parent-style-name="Text_20_body" style:next-style-name="Text_20_body">
      <style:paragraph-properties fo:text-align="end"/>
    </style:style>
    <style:style style:name="AlignLeft" style:family="paragraph" style:parent-style-name="Text_20_body" style:next-style-name="Text_20_body">
      <style:paragraph-properties fo:text-align="start"/>
    </style:style>
    <style:style style:name="Justified" style:family="paragraph" style:parent-style-name="Text_20_body" style:next-style-name="Text_20_body">
      <style:paragraph-properties fo:text-align="justify"/>
    </style:style>
    <style:style style:name="Aside" style:family="paragraph" style:parent-style-name="Text_20_body" style:next-style-name="Text_20_body">
      <style:paragraph-properties fo:margin-left="0.5in" fo:margin-top="0.04in" fo:margin-bottom="0.04in" fo:padding-left="0.08in" fo:border-left="0.02in solid #808080"/>
    </style:style>
    <style:style style:name="font:avant-garde" style:family="text">
      <style:text-properties fo:font-family="Avant Garde"/>
    </style:style>
    <style:style style:name="font:avant-garde:para" style:family="paragraph" style:parent-style-name="Text_20_body">
      <style:text-properties fo:font-family="Avant Garde"/>
    </style:style>
    <style:style style:name="font:bookman-old-style" style:family="text">
      <style:text-properties fo:font-family="Bookman Old Style"/>
    </style:style>
    <style:style style:name="font:bookman-old-style:para" style:family="paragraph" style:parent-style-name="Text_20_body">
      <style:text-properties fo:font-family="Bookman Old Style"/>
    </style:style>
    <style:style style:name="font:century-schoolbook" style:family="text">
      <style:text-properties fo:font-family="Century Schoolbook"/>
    </style:style>
    <style:style style:name="font:century-schoolbook:para" style:family="paragraph" style:parent-style-name="Text_20_body">
      <style:text-properties fo:font-family="Century Schoolbook"/>
    </style:style>
    <style:style style:name="font:computer-modern" style:family="text">
      <style:text-properties fo:font-family="Computer Modern"/>
    </style:style>
    <style:style style:name="font:computer-modern:para" style:family="paragraph" style:parent-style-name="Text_20_body">
      <style:text-properties fo:font-family="Computer Modern"/>
    </style:style>
    <style:style style:name="font:courier-new" style:family="text">
      <style:text-properties fo:font-family="Courier New"/>
    </style:style>
    <style:style style:name="font:courier-new:para" style:family="paragraph" style:parent-style-name="Text_20_body">
      <style:text-properties fo:font-family="Courier New"/>
    </style:style>
    <style:style style:name="font:garamond" style:family="text">
      <style:text-properties fo:font-family="Garamond"/>
    </style:style>
    <style:style style:name="font:garamond:para" style:family="paragraph" style:parent-style-name="Text_20_body">
      <style:text-properties fo:font-family="Garamond"/>
    </style:style>
    <style:style style:name="font:georgia" style:family="text">
      <style:text-properties fo:font-family="Georgia"/>
    </style:style>
    <style:style style:name="font:georgia:para" style:family="paragraph" style:parent-style-name="Text_20_body">
      <style:text-properties fo:font-family="Georgia"/>
    </style:style>
    <style:style style:name="font:helvetica" style:family="text">
      <style:text-properties fo:font-family="Helvetica"/>
    </style:style>
    <style:style style:name="font:helvetica:para" style:family="paragraph" style:parent-style-name="Text_20_body">
      <style:text-properties fo:font-family="Helvetica"/>
    </style:style>
    <style:style style:name="font:helvetica-neue" style:family="text">
      <style:text-properties fo:font-family="Helvetica Neue"/>
    </style:style>
    <style:style style:name="font:helvetica-neue:para" style:family="paragraph" style:parent-style-name="Text_20_body">
      <style:text-properties fo:font-family="Helvetica Neue"/>
    </style:style>
    <style:style style:name="font:palatino-linotype" style:family="text">
      <style:text-properties fo:font-family="Palatino Linotype"/>
    </style:style>
    <style:style style:name="font:palatino-linotype:para" style:family="paragraph" style:parent-style-name="Text_20_body">
      <style:text-properties fo:font-family="Palatino Linotype"/>
    </style:style>
    <style:style style:name="font:times-new-roman" style:family="text">
      <style:text-properties fo:font-family="Times New Roman"/>
    </style:style>
    <style:style style:name="font:times-new-roman:para" style:family="paragraph" style:parent-style-name="Text_20_body">
      <style:text-properties fo:font-family="Times New Roman"/>
    </style:style>
    <style:style style:name="size:0.6" style:family="text">
      <style:text-properties fo:font-size="7.2pt"/>
    </style:style>
    <style:style style:name="size:0.6:para" style:family="paragraph" style:parent-style-name="Text_20_body">
      <style:text-properties fo:font-size="7.2pt"/>
    </style:style>
    <style:style style:name="size:0.7" style:family="text">
      <style:text-properties fo:font-size="8.4pt"/>
    </style:style>
    <style:style style:name="size:0.7:para" style:family="paragraph" style:parent-style-name="Text_20_body">
      <style:text-properties fo:font-size="8.4pt"/>
    </style:style>
    <style:style style:name="size:0.8" style:family="text">
      <style:text-properties fo:font-size="9.6pt"/>
    </style:style>
    <style:style style:name="size:0.8:para" style:family="paragraph" style:parent-style-name="Text_20_body">
      <style:text-properties fo:font-size="9.6pt"/>
    </style:style>
    <style:style style:name="size:0.9" style:family="text">
      <style:text-properties fo:font-size="10.8pt"/>
    </style:style>
    <style:style style:name="size:0.9:para" style:family="paragraph" style:parent-style-name="Text_20_body">
      <style:text-properties fo:font-size="10.8pt"/>
    </style:style>
    <style:style style:name="size:1.0" style:family="text">
      <style:text-properties fo:font-size="12.0pt"/>
    </style:style>
    <style:style style:name="size:1.0:para" style:family="paragraph" style:parent-style-name="Text_20_body">
      <style:text-properties fo:font-size="12.0pt"/>
    </style:style>
    <style:style style:name="size:1.2" style:family="text">
      <style:text-properties fo:font-size="14.4pt"/>
    </style:style>
    <style:style style:name="size:1.2:para" style:family="paragraph" style:parent-style-name="Text_20_body">
      <style:text-properties fo:font-size="14.4pt"/>
    </style:style>
    <style:style style:name="size:1.44" style:family="text">
      <style:text-properties fo:font-size="17.3pt"/>
    </style:style>
    <style:style style:name="size:1.44:para" style:family="paragraph" style:parent-style-name="Text_20_body">
      <style:text-properties fo:font-size="17.3pt"/>
    </style:style>
    <style:style style:name="size:1.728" style:family="text">
      <style:text-properties fo:font-size="20.7pt"/>
    </style:style>
    <style:style style:name="size:1.728:para" style:family="paragraph" style:parent-style-name="Text_20_body">
      <style:text-properties fo:font-size="20.7pt"/>
    </style:style>
    <style:style style:name="size:2.074" style:family="text">
      <style:text-properties fo:font-size="24.9pt"/>
    </style:style>
    <style:style style:name="size:2.074:para" style:family="paragraph" style:parent-style-name="Text_20_body">
      <style:text-properties fo:font-size="24.9pt"/>
    </style:style>
    <style:style style:name="size:2.488" style:family="text">
      <style:text-properties fo:font-size="29.9pt"/>
    </style:style>
    <style:style style:name="size:2.488:para" style:family="paragraph" style:parent-style-name="Text_20_body">
      <style:text-properties fo:font-size="29.9pt"/>
    </style:style>
    <style:style style:name="style:italic" style:family="text">
      <style:text-properties fo:font-style="italic"/>
    </style:style>
    <style:style style:name="style:italic:para" style:family="paragraph" style:parent-style-name="Text_20_body">
      <style:text-properties fo:font-style="italic"/>
    </style:style>
    <style:style style:name="style:bold" style:family="text">
      <style:text-properties fo:font-weight="bold"/>
    </style:style>
    <style:style style:name="style:bold:para" style:family="paragraph" style:parent-style-name="Text_20_body">
      <style:text-properties fo:font-weight="bold"/>
    </style:style>
    <style:style style:name="style:bold-italic" style:family="text">
      <style:text-properties fo:font-style="italic" fo:font-weight="bold"/>
    </style:style>
    <style:style style:name="style:bold-italic:para" style:family="paragraph" style:parent-style-name="Text_20_body">
      <style:text-properties fo:font-style="italic" fo:font-weight="bold"/>
    </style:style>
    <style:style style:name="font:avant-garde:0.6" style:family="text">
      <style:text-properties fo:font-family="Avant Garde" fo:font-size="7.2pt"/>
    </style:style>
    <style:style style:name="font:avant-garde:0.6:para" style:family="paragraph" style:parent-style-name="Text_20_body">
      <style:text-properties fo:font-family="Avant Garde" fo:font-size="7.2pt"/>
    </style:style>
    <style:style style:name="font:avant-garde:0.7" style:family="text">
      <style:text-properties fo:font-family="Avant Garde" fo:font-size="8.4pt"/>
    </style:style>
    <style:style style:name="font:avant-garde:0.7:para" style:family="paragraph" style:parent-style-name="Text_20_body">
      <style:text-properties fo:font-family="Avant Garde" fo:font-size="8.4pt"/>
    </style:style>
    <style:style style:name="font:avant-garde:0.8" style:family="text">
      <style:text-properties fo:font-family="Avant Garde" fo:font-size="9.6pt"/>
    </style:style>
    <style:style style:name="font:avant-garde:0.8:para" style:family="paragraph" style:parent-style-name="Text_20_body">
      <style:text-properties fo:font-family="Avant Garde" fo:font-size="9.6pt"/>
    </style:style>
    <style:style style:name="font:avant-garde:0.9" style:family="text">
      <style:text-properties fo:font-family="Avant Garde" fo:font-size="10.8pt"/>
    </style:style>
    <style:style style:name="font:avant-garde:0.9:para" style:family="paragraph" style:parent-style-name="Text_20_body">
      <style:text-properties fo:font-family="Avant Garde" fo:font-size="10.8pt"/>
    </style:style>
    <style:style style:name="font:avant-garde:1.0" style:family="text">
      <style:text-properties fo:font-family="Avant Garde" fo:font-size="12.0pt"/>
    </style:style>
    <style:style style:name="font:avant-garde:1.0:para" style:family="paragraph" style:parent-style-name="Text_20_body">
      <style:text-properties fo:font-family="Avant Garde" fo:font-size="12.0pt"/>
    </style:style>
    <style:style style:name="font:avant-garde:1.2" style:family="text">
      <style:text-properties fo:font-family="Avant Garde" fo:font-size="14.4pt"/>
    </style:style>
    <style:style style:name="font:avant-garde:1.2:para" style:family="paragraph" style:parent-style-name="Text_20_body">
      <style:text-properties fo:font-family="Avant Garde" fo:font-size="14.4pt"/>
    </style:style>
    <style:style style:name="font:avant-garde:1.44" style:family="text">
      <style:text-properties fo:font-family="Avant Garde" fo:font-size="17.3pt"/>
    </style:style>
    <style:style style:name="font:avant-garde:1.44:para" style:family="paragraph" style:parent-style-name="Text_20_body">
      <style:text-properties fo:font-family="Avant Garde" fo:font-size="17.3pt"/>
    </style:style>
    <style:style style:name="font:avant-garde:1.728" style:family="text">
      <style:text-properties fo:font-family="Avant Garde" fo:font-size="20.7pt"/>
    </style:style>
    <style:style style:name="font:avant-garde:1.728:para" style:family="paragraph" style:parent-style-name="Text_20_body">
      <style:text-properties fo:font-family="Avant Garde" fo:font-size="20.7pt"/>
    </style:style>
    <style:style style:name="font:avant-garde:2.074" style:family="text">
      <style:text-properties fo:font-family="Avant Garde" fo:font-size="24.9pt"/>
    </style:style>
    <style:style style:name="font:avant-garde:2.074:para" style:family="paragraph" style:parent-style-name="Text_20_body">
      <style:text-properties fo:font-family="Avant Garde" fo:font-size="24.9pt"/>
    </style:style>
    <style:style style:name="font:avant-garde:2.488" style:family="text">
      <style:text-properties fo:font-family="Avant Garde" fo:font-size="29.9pt"/>
    </style:style>
    <style:style style:name="font:avant-garde:2.488:para" style:family="paragraph" style:parent-style-name="Text_20_body">
      <style:text-properties fo:font-family="Avant Garde" fo:font-size="29.9pt"/>
    </style:style>
    <style:style style:name="font:bookman-old-style:0.6" style:family="text">
      <style:text-properties fo:font-family="Bookman Old Style" fo:font-size="7.2pt"/>
    </style:style>
    <style:style style:name="font:bookman-old-style:0.6:para" style:family="paragraph" style:parent-style-name="Text_20_body">
      <style:text-properties fo:font-family="Bookman Old Style" fo:font-size="7.2pt"/>
    </style:style>
    <style:style style:name="font:bookman-old-style:0.7" style:family="text">
      <style:text-properties fo:font-family="Bookman Old Style" fo:font-size="8.4pt"/>
    </style:style>
    <style:style style:name="font:bookman-old-style:0.7:para" style:family="paragraph" style:parent-style-name="Text_20_body">
      <style:text-properties fo:font-family="Bookman Old Style" fo:font-size="8.4pt"/>
    </style:style>
    <style:style style:name="font:bookman-old-style:0.8" style:family="text">
      <style:text-properties fo:font-family="Bookman Old Style" fo:font-size="9.6pt"/>
    </style:style>
    <style:style style:name="font:bookman-old-style:0.8:para" style:family="paragraph" style:parent-style-name="Text_20_body">
      <style:text-properties fo:font-family="Bookman Old Style" fo:font-size="9.6pt"/>
    </style:style>
    <style:style style:name="font:bookman-old-style:0.9" style:family="text">
      <style:text-properties fo:font-family="Bookman Old Style" fo:font-size="10.8pt"/>
    </style:style>
    <style:style style:name="font:bookman-old-style:0.9:para" style:family="paragraph" style:parent-style-name="Text_20_body">
      <style:text-properties fo:font-family="Bookman Old Style" fo:font-size="10.8pt"/>
    </style:style>
    <style:style style:name="font:bookman-old-style:1.0" style:family="text">
      <style:text-properties fo:font-family="Bookman Old Style" fo:font-size="12.0pt"/>
    </style:style>
    <style:style style:name="font:bookman-old-style:1.0:para" style:family="paragraph" style:parent-style-name="Text_20_body">
      <style:text-properties fo:font-family="Bookman Old Style" fo:font-size="12.0pt"/>
    </style:style>
    <style:style style:name="font:bookman-old-style:1.2" style:family="text">
      <style:text-properties fo:font-family="Bookman Old Style" fo:font-size="14.4pt"/>
    </style:style>
    <style:style style:name="font:bookman-old-style:1.2:para" style:family="paragraph" style:parent-style-name="Text_20_body">
      <style:text-properties fo:font-family="Bookman Old Style" fo:font-size="14.4pt"/>
    </style:style>
    <style:style style:name="font:bookman-old-style:1.44" style:family="text">
      <style:text-properties fo:font-family="Bookman Old Style" fo:font-size="17.3pt"/>
    </style:style>
    <style:style style:name="font:bookman-old-style:1.44:para" style:family="paragraph" style:parent-style-name="Text_20_body">
      <style:text-properties fo:font-family="Bookman Old Style" fo:font-size="17.3pt"/>
    </style:style>
    <style:style style:name="font:bookman-old-style:1.728" style:family="text">
      <style:text-properties fo:font-family="Bookman Old Style" fo:font-size="20.7pt"/>
    </style:style>
    <style:style style:name="font:bookman-old-style:1.728:para" style:family="paragraph" style:parent-style-name="Text_20_body">
      <style:text-properties fo:font-family="Bookman Old Style" fo:font-size="20.7pt"/>
    </style:style>
    <style:style style:name="font:bookman-old-style:2.074" style:family="text">
      <style:text-properties fo:font-family="Bookman Old Style" fo:font-size="24.9pt"/>
    </style:style>
    <style:style style:name="font:bookman-old-style:2.074:para" style:family="paragraph" style:parent-style-name="Text_20_body">
      <style:text-properties fo:font-family="Bookman Old Style" fo:font-size="24.9pt"/>
    </style:style>
    <style:style style:name="font:bookman-old-style:2.488" style:family="text">
      <style:text-properties fo:font-family="Bookman Old Style" fo:font-size="29.9pt"/>
    </style:style>
    <style:style style:name="font:bookman-old-style:2.488:para" style:family="paragraph" style:parent-style-name="Text_20_body">
      <style:text-properties fo:font-family="Bookman Old Style" fo:font-size="29.9pt"/>
    </style:style>
    <style:style style:name="font:century-schoolbook:0.6" style:family="text">
      <style:text-properties fo:font-family="Century Schoolbook" fo:font-size="7.2pt"/>
    </style:style>
    <style:style style:name="font:century-schoolbook:0.6:para" style:family="paragraph" style:parent-style-name="Text_20_body">
      <style:text-properties fo:font-family="Century Schoolbook" fo:font-size="7.2pt"/>
    </style:style>
    <style:style style:name="font:century-schoolbook:0.7" style:family="text">
      <style:text-properties fo:font-family="Century Schoolbook" fo:font-size="8.4pt"/>
    </style:style>
    <style:style style:name="font:century-schoolbook:0.7:para" style:family="paragraph" style:parent-style-name="Text_20_body">
      <style:text-properties fo:font-family="Century Schoolbook" fo:font-size="8.4pt"/>
    </style:style>
    <style:style style:name="font:century-schoolbook:0.8" style:family="text">
      <style:text-properties fo:font-family="Century Schoolbook" fo:font-size="9.6pt"/>
    </style:style>
    <style:style style:name="font:century-schoolbook:0.8:para" style:family="paragraph" style:parent-style-name="Text_20_body">
      <style:text-properties fo:font-family="Century Schoolbook" fo:font-size="9.6pt"/>
    </style:style>
    <style:style style:name="font:century-schoolbook:0.9" style:family="text">
      <style:text-properties fo:font-family="Century Schoolbook" fo:font-size="10.8pt"/>
    </style:style>
    <style:style style:name="font:century-schoolbook:0.9:para" style:family="paragraph" style:parent-style-name="Text_20_body">
      <style:text-properties fo:font-family="Century Schoolbook" fo:font-size="10.8pt"/>
    </style:style>
    <style:style style:name="font:century-schoolbook:1.0" style:family="text">
      <style:text-properties fo:font-family="Century Schoolbook" fo:font-size="12.0pt"/>
    </style:style>
    <style:style style:name="font:century-schoolbook:1.0:para" style:family="paragraph" style:parent-style-name="Text_20_body">
      <style:text-properties fo:font-family="Century Schoolbook" fo:font-size="12.0pt"/>
    </style:style>
    <style:style style:name="font:century-schoolbook:1.2" style:family="text">
      <style:text-properties fo:font-family="Century Schoolbook" fo:font-size="14.4pt"/>
    </style:style>
    <style:style style:name="font:century-schoolbook:1.2:para" style:family="paragraph" style:parent-style-name="Text_20_body">
      <style:text-properties fo:font-family="Century Schoolbook" fo:font-size="14.4pt"/>
    </style:style>
    <style:style style:name="font:century-schoolbook:1.44" style:family="text">
      <style:text-properties fo:font-family="Century Schoolbook" fo:font-size="17.3pt"/>
    </style:style>
    <style:style style:name="font:century-schoolbook:1.44:para" style:family="paragraph" style:parent-style-name="Text_20_body">
      <style:text-properties fo:font-family="Century Schoolbook" fo:font-size="17.3pt"/>
    </style:style>
    <style:style style:name="font:century-schoolbook:1.728" style:family="text">
      <style:text-properties fo:font-family="Century Schoolbook" fo:font-size="20.7pt"/>
    </style:style>
    <style:style style:name="font:century-schoolbook:1.728:para" style:family="paragraph" style:parent-style-name="Text_20_body">
      <style:text-properties fo:font-family="Century Schoolbook" fo:font-size="20.7pt"/>
    </style:style>
    <style:style style:name="font:century-schoolbook:2.074" style:family="text">
      <style:text-properties fo:font-family="Century Schoolbook" fo:font-size="24.9pt"/>
    </style:style>
    <style:style style:name="font:century-schoolbook:2.074:para" style:family="paragraph" style:parent-style-name="Text_20_body">
      <style:text-properties fo:font-family="Century Schoolbook" fo:font-size="24.9pt"/>
    </style:style>
    <style:style style:name="font:century-schoolbook:2.488" style:family="text">
      <style:text-properties fo:font-family="Century Schoolbook" fo:font-size="29.9pt"/>
    </style:style>
    <style:style style:name="font:century-schoolbook:2.488:para" style:family="paragraph" style:parent-style-name="Text_20_body">
      <style:text-properties fo:font-family="Century Schoolbook" fo:font-size="29.9pt"/>
    </style:style>
    <style:style style:name="font:computer-modern:0.6" style:family="text">
      <style:text-properties fo:font-family="Computer Modern" fo:font-size="7.2pt"/>
    </style:style>
    <style:style style:name="font:computer-modern:0.6:para" style:family="paragraph" style:parent-style-name="Text_20_body">
      <style:text-properties fo:font-family="Computer Modern" fo:font-size="7.2pt"/>
    </style:style>
    <style:style style:name="font:computer-modern:0.7" style:family="text">
      <style:text-properties fo:font-family="Computer Modern" fo:font-size="8.4pt"/>
    </style:style>
    <style:style style:name="font:computer-modern:0.7:para" style:family="paragraph" style:parent-style-name="Text_20_body">
      <style:text-properties fo:font-family="Computer Modern" fo:font-size="8.4pt"/>
    </style:style>
    <style:style style:name="font:computer-modern:0.8" style:family="text">
      <style:text-properties fo:font-family="Computer Modern" fo:font-size="9.6pt"/>
    </style:style>
    <style:style style:name="font:computer-modern:0.8:para" style:family="paragraph" style:parent-style-name="Text_20_body">
      <style:text-properties fo:font-family="Computer Modern" fo:font-size="9.6pt"/>
    </style:style>
    <style:style style:name="font:computer-modern:0.9" style:family="text">
      <style:text-properties fo:font-family="Computer Modern" fo:font-size="10.8pt"/>
    </style:style>
    <style:style style:name="font:computer-modern:0.9:para" style:family="paragraph" style:parent-style-name="Text_20_body">
      <style:text-properties fo:font-family="Computer Modern" fo:font-size="10.8pt"/>
    </style:style>
    <style:style style:name="font:computer-modern:1.0" style:family="text">
      <style:text-properties fo:font-family="Computer Modern" fo:font-size="12.0pt"/>
    </style:style>
    <style:style style:name="font:computer-modern:1.0:para" style:family="paragraph" style:parent-style-name="Text_20_body">
      <style:text-properties fo:font-family="Computer Modern" fo:font-size="12.0pt"/>
    </style:style>
    <style:style style:name="font:computer-modern:1.2" style:family="text">
      <style:text-properties fo:font-family="Computer Modern" fo:font-size="14.4pt"/>
    </style:style>
    <style:style style:name="font:computer-modern:1.2:para" style:family="paragraph" style:parent-style-name="Text_20_body">
      <style:text-properties fo:font-family="Computer Modern" fo:font-size="14.4pt"/>
    </style:style>
    <style:style style:name="font:computer-modern:1.44" style:family="text">
      <style:text-properties fo:font-family="Computer Modern" fo:font-size="17.3pt"/>
    </style:style>
    <style:style style:name="font:computer-modern:1.44:para" style:family="paragraph" style:parent-style-name="Text_20_body">
      <style:text-properties fo:font-family="Computer Modern" fo:font-size="17.3pt"/>
    </style:style>
    <style:style style:name="font:computer-modern:1.728" style:family="text">
      <style:text-properties fo:font-family="Computer Modern" fo:font-size="20.7pt"/>
    </style:style>
    <style:style style:name="font:computer-modern:1.728:para" style:family="paragraph" style:parent-style-name="Text_20_body">
      <style:text-properties fo:font-family="Computer Modern" fo:font-size="20.7pt"/>
    </style:style>
    <style:style style:name="font:computer-modern:2.074" style:family="text">
      <style:text-properties fo:font-family="Computer Modern" fo:font-size="24.9pt"/>
    </style:style>
    <style:style style:name="font:computer-modern:2.074:para" style:family="paragraph" style:parent-style-name="Text_20_body">
      <style:text-properties fo:font-family="Computer Modern" fo:font-size="24.9pt"/>
    </style:style>
    <style:style style:name="font:computer-modern:2.488" style:family="text">
      <style:text-properties fo:font-family="Computer Modern" fo:font-size="29.9pt"/>
    </style:style>
    <style:style style:name="font:computer-modern:2.488:para" style:family="paragraph" style:parent-style-name="Text_20_body">
      <style:text-properties fo:font-family="Computer Modern" fo:font-size="29.9pt"/>
    </style:style>
    <style:style style:name="font:courier-new:0.6" style:family="text">
      <style:text-properties fo:font-family="Courier New" fo:font-size="7.2pt"/>
    </style:style>
    <style:style style:name="font:courier-new:0.6:para" style:family="paragraph" style:parent-style-name="Text_20_body">
      <style:text-properties fo:font-family="Courier New" fo:font-size="7.2pt"/>
    </style:style>
    <style:style style:name="font:courier-new:0.7" style:family="text">
      <style:text-properties fo:font-family="Courier New" fo:font-size="8.4pt"/>
    </style:style>
    <style:style style:name="font:courier-new:0.7:para" style:family="paragraph" style:parent-style-name="Text_20_body">
      <style:text-properties fo:font-family="Courier New" fo:font-size="8.4pt"/>
    </style:style>
    <style:style style:name="font:courier-new:0.8" style:family="text">
      <style:text-properties fo:font-family="Courier New" fo:font-size="9.6pt"/>
    </style:style>
    <style:style style:name="font:courier-new:0.8:para" style:family="paragraph" style:parent-style-name="Text_20_body">
      <style:text-properties fo:font-family="Courier New" fo:font-size="9.6pt"/>
    </style:style>
    <style:style style:name="font:courier-new:0.9" style:family="text">
      <style:text-properties fo:font-family="Courier New" fo:font-size="10.8pt"/>
    </style:style>
    <style:style style:name="font:courier-new:0.9:para" style:family="paragraph" style:parent-style-name="Text_20_body">
      <style:text-properties fo:font-family="Courier New" fo:font-size="10.8pt"/>
    </style:style>
    <style:style style:name="font:courier-new:1.0" style:family="text">
      <style:text-properties fo:font-family="Courier New" fo:font-size="12.0pt"/>
    </style:style>
    <style:style style:name="font:courier-new:1.0:para" style:family="paragraph" style:parent-style-name="Text_20_body">
      <style:text-properties fo:font-family="Courier New" fo:font-size="12.0pt"/>
    </style:style>
    <style:style style:name="font:courier-new:1.2" style:family="text">
      <style:text-properties fo:font-family="Courier New" fo:font-size="14.4pt"/>
    </style:style>
    <style:style style:name="font:courier-new:1.2:para" style:family="paragraph" style:parent-style-name="Text_20_body">
      <style:text-properties fo:font-family="Courier New" fo:font-size="14.4pt"/>
    </style:style>
    <style:style style:name="font:courier-new:1.44" style:family="text">
      <style:text-properties fo:font-family="Courier New" fo:font-size="17.3pt"/>
    </style:style>
    <style:style style:name="font:courier-new:1.44:para" style:family="paragraph" style:parent-style-name="Text_20_body">
      <style:text-properties fo:font-family="Courier New" fo:font-size="17.3pt"/>
    </style:style>
    <style:style style:name="font:courier-new:1.728" style:family="text">
      <style:text-properties fo:font-family="Courier New" fo:font-size="20.7pt"/>
    </style:style>
    <style:style style:name="font:courier-new:1.728:para" style:family="paragraph" style:parent-style-name="Text_20_body">
      <style:text-properties fo:font-family="Courier New" fo:font-size="20.7pt"/>
    </style:style>
    <style:style style:name="font:courier-new:2.074" style:family="text">
      <style:text-properties fo:font-family="Courier New" fo:font-size="24.9pt"/>
    </style:style>
    <style:style style:name="font:courier-new:2.074:para" style:family="paragraph" style:parent-style-name="Text_20_body">
      <style:text-properties fo:font-family="Courier New" fo:font-size="24.9pt"/>
    </style:style>
    <style:style style:name="font:courier-new:2.488" style:family="text">
      <style:text-properties fo:font-family="Courier New" fo:font-size="29.9pt"/>
    </style:style>
    <style:style style:name="font:courier-new:2.488:para" style:family="paragraph" style:parent-style-name="Text_20_body">
      <style:text-properties fo:font-family="Courier New" fo:font-size="29.9pt"/>
    </style:style>
    <style:style style:name="font:garamond:0.6" style:family="text">
      <style:text-properties fo:font-family="Garamond" fo:font-size="7.2pt"/>
    </style:style>
    <style:style style:name="font:garamond:0.6:para" style:family="paragraph" style:parent-style-name="Text_20_body">
      <style:text-properties fo:font-family="Garamond" fo:font-size="7.2pt"/>
    </style:style>
    <style:style style:name="font:garamond:0.7" style:family="text">
      <style:text-properties fo:font-family="Garamond" fo:font-size="8.4pt"/>
    </style:style>
    <style:style style:name="font:garamond:0.7:para" style:family="paragraph" style:parent-style-name="Text_20_body">
      <style:text-properties fo:font-family="Garamond" fo:font-size="8.4pt"/>
    </style:style>
    <style:style style:name="font:garamond:0.8" style:family="text">
      <style:text-properties fo:font-family="Garamond" fo:font-size="9.6pt"/>
    </style:style>
    <style:style style:name="font:garamond:0.8:para" style:family="paragraph" style:parent-style-name="Text_20_body">
      <style:text-properties fo:font-family="Garamond" fo:font-size="9.6pt"/>
    </style:style>
    <style:style style:name="font:garamond:0.9" style:family="text">
      <style:text-properties fo:font-family="Garamond" fo:font-size="10.8pt"/>
    </style:style>
    <style:style style:name="font:garamond:0.9:para" style:family="paragraph" style:parent-style-name="Text_20_body">
      <style:text-properties fo:font-family="Garamond" fo:font-size="10.8pt"/>
    </style:style>
    <style:style style:name="font:garamond:1.0" style:family="text">
      <style:text-properties fo:font-family="Garamond" fo:font-size="12.0pt"/>
    </style:style>
    <style:style style:name="font:garamond:1.0:para" style:family="paragraph" style:parent-style-name="Text_20_body">
      <style:text-properties fo:font-family="Garamond" fo:font-size="12.0pt"/>
    </style:style>
    <style:style style:name="font:garamond:1.2" style:family="text">
      <style:text-properties fo:font-family="Garamond" fo:font-size="14.4pt"/>
    </style:style>
    <style:style style:name="font:garamond:1.2:para" style:family="paragraph" style:parent-style-name="Text_20_body">
      <style:text-properties fo:font-family="Garamond" fo:font-size="14.4pt"/>
    </style:style>
    <style:style style:name="font:garamond:1.44" style:family="text">
      <style:text-properties fo:font-family="Garamond" fo:font-size="17.3pt"/>
    </style:style>
    <style:style style:name="font:garamond:1.44:para" style:family="paragraph" style:parent-style-name="Text_20_body">
      <style:text-properties fo:font-family="Garamond" fo:font-size="17.3pt"/>
    </style:style>
    <style:style style:name="font:garamond:1.728" style:family="text">
      <style:text-properties fo:font-family="Garamond" fo:font-size="20.7pt"/>
    </style:style>
    <style:style style:name="font:garamond:1.728:para" style:family="paragraph" style:parent-style-name="Text_20_body">
      <style:text-properties fo:font-family="Garamond" fo:font-size="20.7pt"/>
    </style:style>
    <style:style style:name="font:garamond:2.074" style:family="text">
      <style:text-properties fo:font-family="Garamond" fo:font-size="24.9pt"/>
    </style:style>
    <style:style style:name="font:garamond:2.074:para" style:family="paragraph" style:parent-style-name="Text_20_body">
      <style:text-properties fo:font-family="Garamond" fo:font-size="24.9pt"/>
    </style:style>
    <style:style style:name="font:garamond:2.488" style:family="text">
      <style:text-properties fo:font-family="Garamond" fo:font-size="29.9pt"/>
    </style:style>
    <style:style style:name="font:garamond:2.488:para" style:family="paragraph" style:parent-style-name="Text_20_body">
      <style:text-properties fo:font-family="Garamond" fo:font-size="29.9pt"/>
    </style:style>
    <style:style style:name="font:georgia:0.6" style:family="text">
      <style:text-properties fo:font-family="Georgia" fo:font-size="7.2pt"/>
    </style:style>
    <style:style style:name="font:georgia:0.6:para" style:family="paragraph" style:parent-style-name="Text_20_body">
      <style:text-properties fo:font-family="Georgia" fo:font-size="7.2pt"/>
    </style:style>
    <style:style style:name="font:georgia:0.7" style:family="text">
      <style:text-properties fo:font-family="Georgia" fo:font-size="8.4pt"/>
    </style:style>
    <style:style style:name="font:georgia:0.7:para" style:family="paragraph" style:parent-style-name="Text_20_body">
      <style:text-properties fo:font-family="Georgia" fo:font-size="8.4pt"/>
    </style:style>
    <style:style style:name="font:georgia:0.8" style:family="text">
      <style:text-properties fo:font-family="Georgia" fo:font-size="9.6pt"/>
    </style:style>
    <style:style style:name="font:georgia:0.8:para" style:family="paragraph" style:parent-style-name="Text_20_body">
      <style:text-properties fo:font-family="Georgia" fo:font-size="9.6pt"/>
    </style:style>
    <style:style style:name="font:georgia:0.9" style:family="text">
      <style:text-properties fo:font-family="Georgia" fo:font-size="10.8pt"/>
    </style:style>
    <style:style style:name="font:georgia:0.9:para" style:family="paragraph" style:parent-style-name="Text_20_body">
      <style:text-properties fo:font-family="Georgia" fo:font-size="10.8pt"/>
    </style:style>
    <style:style style:name="font:georgia:1.0" style:family="text">
      <style:text-properties fo:font-family="Georgia" fo:font-size="12.0pt"/>
    </style:style>
    <style:style style:name="font:georgia:1.0:para" style:family="paragraph" style:parent-style-name="Text_20_body">
      <style:text-properties fo:font-family="Georgia" fo:font-size="12.0pt"/>
    </style:style>
    <style:style style:name="font:georgia:1.2" style:family="text">
      <style:text-properties fo:font-family="Georgia" fo:font-size="14.4pt"/>
    </style:style>
    <style:style style:name="font:georgia:1.2:para" style:family="paragraph" style:parent-style-name="Text_20_body">
      <style:text-properties fo:font-family="Georgia" fo:font-size="14.4pt"/>
    </style:style>
    <style:style style:name="font:georgia:1.44" style:family="text">
      <style:text-properties fo:font-family="Georgia" fo:font-size="17.3pt"/>
    </style:style>
    <style:style style:name="font:georgia:1.44:para" style:family="paragraph" style:parent-style-name="Text_20_body">
      <style:text-properties fo:font-family="Georgia" fo:font-size="17.3pt"/>
    </style:style>
    <style:style style:name="font:georgia:1.728" style:family="text">
      <style:text-properties fo:font-family="Georgia" fo:font-size="20.7pt"/>
    </style:style>
    <style:style style:name="font:georgia:1.728:para" style:family="paragraph" style:parent-style-name="Text_20_body">
      <style:text-properties fo:font-family="Georgia" fo:font-size="20.7pt"/>
    </style:style>
    <style:style style:name="font:georgia:2.074" style:family="text">
      <style:text-properties fo:font-family="Georgia" fo:font-size="24.9pt"/>
    </style:style>
    <style:style style:name="font:georgia:2.074:para" style:family="paragraph" style:parent-style-name="Text_20_body">
      <style:text-properties fo:font-family="Georgia" fo:font-size="24.9pt"/>
    </style:style>
    <style:style style:name="font:georgia:2.488" style:family="text">
      <style:text-properties fo:font-family="Georgia" fo:font-size="29.9pt"/>
    </style:style>
    <style:style style:name="font:georgia:2.488:para" style:family="paragraph" style:parent-style-name="Text_20_body">
      <style:text-properties fo:font-family="Georgia" fo:font-size="29.9pt"/>
    </style:style>
    <style:style style:name="font:helvetica:0.6" style:family="text">
      <style:text-properties fo:font-family="Helvetica" fo:font-size="7.2pt"/>
    </style:style>
    <style:style style:name="font:helvetica:0.6:para" style:family="paragraph" style:parent-style-name="Text_20_body">
      <style:text-properties fo:font-family="Helvetica" fo:font-size="7.2pt"/>
    </style:style>
    <style:style style:name="font:helvetica:0.7" style:family="text">
      <style:text-properties fo:font-family="Helvetica" fo:font-size="8.4pt"/>
    </style:style>
    <style:style style:name="font:helvetica:0.7:para" style:family="paragraph" style:parent-style-name="Text_20_body">
      <style:text-properties fo:font-family="Helvetica" fo:font-size="8.4pt"/>
    </style:style>
    <style:style style:name="font:helvetica:0.8" style:family="text">
      <style:text-properties fo:font-family="Helvetica" fo:font-size="9.6pt"/>
    </style:style>
    <style:style style:name="font:helvetica:0.8:para" style:family="paragraph" style:parent-style-name="Text_20_body">
      <style:text-properties fo:font-family="Helvetica" fo:font-size="9.6pt"/>
    </style:style>
    <style:style style:name="font:helvetica:0.9" style:family="text">
      <style:text-properties fo:font-family="Helvetica" fo:font-size="10.8pt"/>
    </style:style>
    <style:style style:name="font:helvetica:0.9:para" style:family="paragraph" style:parent-style-name="Text_20_body">
      <style:text-properties fo:font-family="Helvetica" fo:font-size="10.8pt"/>
    </style:style>
    <style:style style:name="font:helvetica:1.0" style:family="text">
      <style:text-properties fo:font-family="Helvetica" fo:font-size="12.0pt"/>
    </style:style>
    <style:style style:name="font:helvetica:1.0:para" style:family="paragraph" style:parent-style-name="Text_20_body">
      <style:text-properties fo:font-family="Helvetica" fo:font-size="12.0pt"/>
    </style:style>
    <style:style style:name="font:helvetica:1.2" style:family="text">
      <style:text-properties fo:font-family="Helvetica" fo:font-size="14.4pt"/>
    </style:style>
    <style:style style:name="font:helvetica:1.2:para" style:family="paragraph" style:parent-style-name="Text_20_body">
      <style:text-properties fo:font-family="Helvetica" fo:font-size="14.4pt"/>
    </style:style>
    <style:style style:name="font:helvetica:1.44" style:family="text">
      <style:text-properties fo:font-family="Helvetica" fo:font-size="17.3pt"/>
    </style:style>
    <style:style style:name="font:helvetica:1.44:para" style:family="paragraph" style:parent-style-name="Text_20_body">
      <style:text-properties fo:font-family="Helvetica" fo:font-size="17.3pt"/>
    </style:style>
    <style:style style:name="font:helvetica:1.728" style:family="text">
      <style:text-properties fo:font-family="Helvetica" fo:font-size="20.7pt"/>
    </style:style>
    <style:style style:name="font:helvetica:1.728:para" style:family="paragraph" style:parent-style-name="Text_20_body">
      <style:text-properties fo:font-family="Helvetica" fo:font-size="20.7pt"/>
    </style:style>
    <style:style style:name="font:helvetica:2.074" style:family="text">
      <style:text-properties fo:font-family="Helvetica" fo:font-size="24.9pt"/>
    </style:style>
    <style:style style:name="font:helvetica:2.074:para" style:family="paragraph" style:parent-style-name="Text_20_body">
      <style:text-properties fo:font-family="Helvetica" fo:font-size="24.9pt"/>
    </style:style>
    <style:style style:name="font:helvetica:2.488" style:family="text">
      <style:text-properties fo:font-family="Helvetica" fo:font-size="29.9pt"/>
    </style:style>
    <style:style style:name="font:helvetica:2.488:para" style:family="paragraph" style:parent-style-name="Text_20_body">
      <style:text-properties fo:font-family="Helvetica" fo:font-size="29.9pt"/>
    </style:style>
    <style:style style:name="font:helvetica-neue:0.6" style:family="text">
      <style:text-properties fo:font-family="Helvetica Neue" fo:font-size="7.2pt"/>
    </style:style>
    <style:style style:name="font:helvetica-neue:0.6:para" style:family="paragraph" style:parent-style-name="Text_20_body">
      <style:text-properties fo:font-family="Helvetica Neue" fo:font-size="7.2pt"/>
    </style:style>
    <style:style style:name="font:helvetica-neue:0.7" style:family="text">
      <style:text-properties fo:font-family="Helvetica Neue" fo:font-size="8.4pt"/>
    </style:style>
    <style:style style:name="font:helvetica-neue:0.7:para" style:family="paragraph" style:parent-style-name="Text_20_body">
      <style:text-properties fo:font-family="Helvetica Neue" fo:font-size="8.4pt"/>
    </style:style>
    <style:style style:name="font:helvetica-neue:0.8" style:family="text">
      <style:text-properties fo:font-family="Helvetica Neue" fo:font-size="9.6pt"/>
    </style:style>
    <style:style style:name="font:helvetica-neue:0.8:para" style:family="paragraph" style:parent-style-name="Text_20_body">
      <style:text-properties fo:font-family="Helvetica Neue" fo:font-size="9.6pt"/>
    </style:style>
    <style:style style:name="font:helvetica-neue:0.9" style:family="text">
      <style:text-properties fo:font-family="Helvetica Neue" fo:font-size="10.8pt"/>
    </style:style>
    <style:style style:name="font:helvetica-neue:0.9:para" style:family="paragraph" style:parent-style-name="Text_20_body">
      <style:text-properties fo:font-family="Helvetica Neue" fo:font-size="10.8pt"/>
    </style:style>
    <style:style style:name="font:helvetica-neue:1.0" style:family="text">
      <style:text-properties fo:font-family="Helvetica Neue" fo:font-size="12.0pt"/>
    </style:style>
    <style:style style:name="font:helvetica-neue:1.0:para" style:family="paragraph" style:parent-style-name="Text_20_body">
      <style:text-properties fo:font-family="Helvetica Neue" fo:font-size="12.0pt"/>
    </style:style>
    <style:style style:name="font:helvetica-neue:1.2" style:family="text">
      <style:text-properties fo:font-family="Helvetica Neue" fo:font-size="14.4pt"/>
    </style:style>
    <style:style style:name="font:helvetica-neue:1.2:para" style:family="paragraph" style:parent-style-name="Text_20_body">
      <style:text-properties fo:font-family="Helvetica Neue" fo:font-size="14.4pt"/>
    </style:style>
    <style:style style:name="font:helvetica-neue:1.44" style:family="text">
      <style:text-properties fo:font-family="Helvetica Neue" fo:font-size="17.3pt"/>
    </style:style>
    <style:style style:name="font:helvetica-neue:1.44:para" style:family="paragraph" style:parent-style-name="Text_20_body">
      <style:text-properties fo:font-family="Helvetica Neue" fo:font-size="17.3pt"/>
    </style:style>
    <style:style style:name="font:helvetica-neue:1.728" style:family="text">
      <style:text-properties fo:font-family="Helvetica Neue" fo:font-size="20.7pt"/>
    </style:style>
    <style:style style:name="font:helvetica-neue:1.728:para" style:family="paragraph" style:parent-style-name="Text_20_body">
      <style:text-properties fo:font-family="Helvetica Neue" fo:font-size="20.7pt"/>
    </style:style>
    <style:style style:name="font:helvetica-neue:2.074" style:family="text">
      <style:text-properties fo:font-family="Helvetica Neue" fo:font-size="24.9pt"/>
    </style:style>
    <style:style style:name="font:helvetica-neue:2.074:para" style:family="paragraph" style:parent-style-name="Text_20_body">
      <style:text-properties fo:font-family="Helvetica Neue" fo:font-size="24.9pt"/>
    </style:style>
    <style:style style:name="font:helvetica-neue:2.488" style:family="text">
      <style:text-properties fo:font-family="Helvetica Neue" fo:font-size="29.9pt"/>
    </style:style>
    <style:style style:name="font:helvetica-neue:2.488:para" style:family="paragraph" style:parent-style-name="Text_20_body">
      <style:text-properties fo:font-family="Helvetica Neue" fo:font-size="29.9pt"/>
    </style:style>
    <style:style style:name="font:palatino-linotype:0.6" style:family="text">
      <style:text-properties fo:font-family="Palatino Linotype" fo:font-size="7.2pt"/>
    </style:style>
    <style:style style:name="font:palatino-linotype:0.6:para" style:family="paragraph" style:parent-style-name="Text_20_body">
      <style:text-properties fo:font-family="Palatino Linotype" fo:font-size="7.2pt"/>
    </style:style>
    <style:style style:name="font:palatino-linotype:0.7" style:family="text">
      <style:text-properties fo:font-family="Palatino Linotype" fo:font-size="8.4pt"/>
    </style:style>
    <style:style style:name="font:palatino-linotype:0.7:para" style:family="paragraph" style:parent-style-name="Text_20_body">
      <style:text-properties fo:font-family="Palatino Linotype" fo:font-size="8.4pt"/>
    </style:style>
    <style:style style:name="font:palatino-linotype:0.8" style:family="text">
      <style:text-properties fo:font-family="Palatino Linotype" fo:font-size="9.6pt"/>
    </style:style>
    <style:style style:name="font:palatino-linotype:0.8:para" style:family="paragraph" style:parent-style-name="Text_20_body">
      <style:text-properties fo:font-family="Palatino Linotype" fo:font-size="9.6pt"/>
    </style:style>
    <style:style style:name="font:palatino-linotype:0.9" style:family="text">
      <style:text-properties fo:font-family="Palatino Linotype" fo:font-size="10.8pt"/>
    </style:style>
    <style:style style:name="font:palatino-linotype:0.9:para" style:family="paragraph" style:parent-style-name="Text_20_body">
      <style:text-properties fo:font-family="Palatino Linotype" fo:font-size="10.8pt"/>
    </style:style>
    <style:style style:name="font:palatino-linotype:1.0" style:family="text">
      <style:text-properties fo:font-family="Palatino Linotype" fo:font-size="12.0pt"/>
    </style:style>
    <style:style style:name="font:palatino-linotype:1.0:para" style:family="paragraph" style:parent-style-name="Text_20_body">
      <style:text-properties fo:font-family="Palatino Linotype" fo:font-size="12.0pt"/>
    </style:style>
    <style:style style:name="font:palatino-linotype:1.2" style:family="text">
      <style:text-properties fo:font-family="Palatino Linotype" fo:font-size="14.4pt"/>
    </style:style>
    <style:style style:name="font:palatino-linotype:1.2:para" style:family="paragraph" style:parent-style-name="Text_20_body">
      <style:text-properties fo:font-family="Palatino Linotype" fo:font-size="14.4pt"/>
    </style:style>
    <style:style style:name="font:palatino-linotype:1.44" style:family="text">
      <style:text-properties fo:font-family="Palatino Linotype" fo:font-size="17.3pt"/>
    </style:style>
    <style:style style:name="font:palatino-linotype:1.44:para" style:family="paragraph" style:parent-style-name="Text_20_body">
      <style:text-properties fo:font-family="Palatino Linotype" fo:font-size="17.3pt"/>
    </style:style>
    <style:style style:name="font:palatino-linotype:1.728" style:family="text">
      <style:text-properties fo:font-family="Palatino Linotype" fo:font-size="20.7pt"/>
    </style:style>
    <style:style style:name="font:palatino-linotype:1.728:para" style:family="paragraph" style:parent-style-name="Text_20_body">
      <style:text-properties fo:font-family="Palatino Linotype" fo:font-size="20.7pt"/>
    </style:style>
    <style:style style:name="font:palatino-linotype:2.074" style:family="text">
      <style:text-properties fo:font-family="Palatino Linotype" fo:font-size="24.9pt"/>
    </style:style>
    <style:style style:name="font:palatino-linotype:2.074:para" style:family="paragraph" style:parent-style-name="Text_20_body">
      <style:text-properties fo:font-family="Palatino Linotype" fo:font-size="24.9pt"/>
    </style:style>
    <style:style style:name="font:palatino-linotype:2.488" style:family="text">
      <style:text-properties fo:font-family="Palatino Linotype" fo:font-size="29.9pt"/>
    </style:style>
    <style:style style:name="font:palatino-linotype:2.488:para" style:family="paragraph" style:parent-style-name="Text_20_body">
      <style:text-properties fo:font-family="Palatino Linotype" fo:font-size="29.9pt"/>
    </style:style>
    <style:style style:name="font:times-new-roman:0.6" style:family="text">
      <style:text-properties fo:font-family="Times New Roman" fo:font-size="7.2pt"/>
    </style:style>
    <style:style style:name="font:times-new-roman:0.6:para" style:family="paragraph" style:parent-style-name="Text_20_body">
      <style:text-properties fo:font-family="Times New Roman" fo:font-size="7.2pt"/>
    </style:style>
    <style:style style:name="font:times-new-roman:0.7" style:family="text">
      <style:text-properties fo:font-family="Times New Roman" fo:font-size="8.4pt"/>
    </style:style>
    <style:style style:name="font:times-new-roman:0.7:para" style:family="paragraph" style:parent-style-name="Text_20_body">
      <style:text-properties fo:font-family="Times New Roman" fo:font-size="8.4pt"/>
    </style:style>
    <style:style style:name="font:times-new-roman:0.8" style:family="text">
      <style:text-properties fo:font-family="Times New Roman" fo:font-size="9.6pt"/>
    </style:style>
    <style:style style:name="font:times-new-roman:0.8:para" style:family="paragraph" style:parent-style-name="Text_20_body">
      <style:text-properties fo:font-family="Times New Roman" fo:font-size="9.6pt"/>
    </style:style>
    <style:style style:name="font:times-new-roman:0.9" style:family="text">
      <style:text-properties fo:font-family="Times New Roman" fo:font-size="10.8pt"/>
    </style:style>
    <style:style style:name="font:times-new-roman:0.9:para" style:family="paragraph" style:parent-style-name="Text_20_body">
      <style:text-properties fo:font-family="Times New Roman" fo:font-size="10.8pt"/>
    </style:style>
    <style:style style:name="font:times-new-roman:1.0" style:family="text">
      <style:text-properties fo:font-family="Times New Roman" fo:font-size="12.0pt"/>
    </style:style>
    <style:style style:name="font:times-new-roman:1.0:para" style:family="paragraph" style:parent-style-name="Text_20_body">
      <style:text-properties fo:font-family="Times New Roman" fo:font-size="12.0pt"/>
    </style:style>
    <style:style style:name="font:times-new-roman:1.2" style:family="text">
      <style:text-properties fo:font-family="Times New Roman" fo:font-size="14.4pt"/>
    </style:style>
    <style:style style:name="font:times-new-roman:1.2:para" style:family="paragraph" style:parent-style-name="Text_20_body">
      <style:text-properties fo:font-family="Times New Roman" fo:font-size="14.4pt"/>
    </style:style>
    <style:style style:name="font:times-new-roman:1.44" style:family="text">
      <style:text-properties fo:font-family="Times New Roman" fo:font-size="17.3pt"/>
    </style:style>
    <style:style style:name="font:times-new-roman:1.44:para" style:family="paragraph" style:parent-style-name="Text_20_body">
      <style:text-properties fo:font-family="Times New Roman" fo:font-size="17.3pt"/>
    </style:style>
    <style:style style:name="font:times-new-roman:1.728" style:family="text">
      <style:text-properties fo:font-family="Times New Roman" fo:font-size="20.7pt"/>
    </style:style>
    <style:style style:name="font:times-new-roman:1.728:para" style:family="paragraph" style:parent-style-name="Text_20_body">
      <style:text-properties fo:font-family="Times New Roman" fo:font-size="20.7pt"/>
    </style:style>
    <style:style style:name="font:times-new-roman:2.074" style:family="text">
      <style:text-properties fo:font-family="Times New Roman" fo:font-size="24.9pt"/>
    </style:style>
    <style:style style:name="font:times-new-roman:2.074:para" style:family="paragraph" style:parent-style-name="Text_20_body">
      <style:text-properties fo:font-family="Times New Roman" fo:font-size="24.9pt"/>
    </style:style>
    <style:style style:name="font:times-new-roman:2.488" style:family="text">
      <style:text-properties fo:font-family="Times New Roman" fo:font-size="29.9pt"/>
    </style:style>
    <style:style style:name="font:times-new-roman:2.488:para" style:family="paragraph" style:parent-style-name="Text_20_body">
      <style:text-properties fo:font-family="Times New Roman" fo:font-size="29.9pt"/>
    </style:style>
    <style:style style:name="font:avant-garde:italic" style:family="text">
      <style:text-properties fo:font-family="Avant Garde" fo:font-style="italic"/>
    </style:style>
    <style:style style:name="font:avant-garde:italic:para" style:family="paragraph" style:parent-style-name="Text_20_body">
      <style:text-properties fo:font-family="Avant Garde" fo:font-style="italic"/>
    </style:style>
    <style:style style:name="font:avant-garde:bold" style:family="text">
      <style:text-properties fo:font-family="Avant Garde" fo:font-weight="bold"/>
    </style:style>
    <style:style style:name="font:avant-garde:bold:para" style:family="paragraph" style:parent-style-name="Text_20_body">
      <style:text-properties fo:font-family="Avant Garde" fo:font-weight="bold"/>
    </style:style>
    <style:style style:name="font:avant-garde:bold-italic" style:family="text">
      <style:text-properties fo:font-family="Avant Garde" fo:font-style="italic" fo:font-weight="bold"/>
    </style:style>
    <style:style style:name="font:avant-garde:bold-italic:para" style:family="paragraph" style:parent-style-name="Text_20_body">
      <style:text-properties fo:font-family="Avant Garde" fo:font-style="italic" fo:font-weight="bold"/>
    </style:style>
    <style:style style:name="font:bookman-old-style:italic" style:family="text">
      <style:text-properties fo:font-family="Bookman Old Style" fo:font-style="italic"/>
    </style:style>
    <style:style style:name="font:bookman-old-style:italic:para" style:family="paragraph" style:parent-style-name="Text_20_body">
      <style:text-properties fo:font-family="Bookman Old Style" fo:font-style="italic"/>
    </style:style>
    <style:style style:name="font:bookman-old-style:bold" style:family="text">
      <style:text-properties fo:font-family="Bookman Old Style" fo:font-weight="bold"/>
    </style:style>
    <style:style style:name="font:bookman-old-style:bold:para" style:family="paragraph" style:parent-style-name="Text_20_body">
      <style:text-properties fo:font-family="Bookman Old Style" fo:font-weight="bold"/>
    </style:style>
    <style:style style:name="font:bookman-old-style:bold-italic" style:family="text">
      <style:text-properties fo:font-family="Bookman Old Style" fo:font-style="italic" fo:font-weight="bold"/>
    </style:style>
    <style:style style:name="font:bookman-old-style:bold-italic:para" style:family="paragraph" style:parent-style-name="Text_20_body">
      <style:text-properties fo:font-family="Bookman Old Style" fo:font-style="italic" fo:font-weight="bold"/>
    </style:style>
    <style:style style:name="font:century-schoolbook:italic" style:family="text">
      <style:text-properties fo:font-family="Century Schoolbook" fo:font-style="italic"/>
    </style:style>
    <style:style style:name="font:century-schoolbook:italic:para" style:family="paragraph" style:parent-style-name="Text_20_body">
      <style:text-properties fo:font-family="Century Schoolbook" fo:font-style="italic"/>
    </style:style>
    <style:style style:name="font:century-schoolbook:bold" style:family="text">
      <style:text-properties fo:font-family="Century Schoolbook" fo:font-weight="bold"/>
    </style:style>
    <style:style style:name="font:century-schoolbook:bold:para" style:family="paragraph" style:parent-style-name="Text_20_body">
      <style:text-properties fo:font-family="Century Schoolbook" fo:font-weight="bold"/>
    </style:style>
    <style:style style:name="font:century-schoolbook:bold-italic" style:family="text">
      <style:text-properties fo:font-family="Century Schoolbook" fo:font-style="italic" fo:font-weight="bold"/>
    </style:style>
    <style:style style:name="font:century-schoolbook:bold-italic:para" style:family="paragraph" style:parent-style-name="Text_20_body">
      <style:text-properties fo:font-family="Century Schoolbook" fo:font-style="italic" fo:font-weight="bold"/>
    </style:style>
    <style:style style:name="font:computer-modern:italic" style:family="text">
      <style:text-properties fo:font-family="Computer Modern" fo:font-style="italic"/>
    </style:style>
    <style:style style:name="font:computer-modern:italic:para" style:family="paragraph" style:parent-style-name="Text_20_body">
      <style:text-properties fo:font-family="Computer Modern" fo:font-style="italic"/>
    </style:style>
    <style:style style:name="font:computer-modern:bold" style:family="text">
      <style:text-properties fo:font-family="Computer Modern" fo:font-weight="bold"/>
    </style:style>
    <style:style style:name="font:computer-modern:bold:para" style:family="paragraph" style:parent-style-name="Text_20_body">
      <style:text-properties fo:font-family="Computer Modern" fo:font-weight="bold"/>
    </style:style>
    <style:style style:name="font:computer-modern:bold-italic" style:family="text">
      <style:text-properties fo:font-family="Computer Modern" fo:font-style="italic" fo:font-weight="bold"/>
    </style:style>
    <style:style style:name="font:computer-modern:bold-italic:para" style:family="paragraph" style:parent-style-name="Text_20_body">
      <style:text-properties fo:font-family="Computer Modern" fo:font-style="italic" fo:font-weight="bold"/>
    </style:style>
    <style:style style:name="font:courier-new:italic" style:family="text">
      <style:text-properties fo:font-family="Courier New" fo:font-style="italic"/>
    </style:style>
    <style:style style:name="font:courier-new:italic:para" style:family="paragraph" style:parent-style-name="Text_20_body">
      <style:text-properties fo:font-family="Courier New" fo:font-style="italic"/>
    </style:style>
    <style:style style:name="font:courier-new:bold" style:family="text">
      <style:text-properties fo:font-family="Courier New" fo:font-weight="bold"/>
    </style:style>
    <style:style style:name="font:courier-new:bold:para" style:family="paragraph" style:parent-style-name="Text_20_body">
      <style:text-properties fo:font-family="Courier New" fo:font-weight="bold"/>
    </style:style>
    <style:style style:name="font:courier-new:bold-italic" style:family="text">
      <style:text-properties fo:font-family="Courier New" fo:font-style="italic" fo:font-weight="bold"/>
    </style:style>
    <style:style style:name="font:courier-new:bold-italic:para" style:family="paragraph" style:parent-style-name="Text_20_body">
      <style:text-properties fo:font-family="Courier New" fo:font-style="italic" fo:font-weight="bold"/>
    </style:style>
    <style:style style:name="font:garamond:italic" style:family="text">
      <style:text-properties fo:font-family="Garamond" fo:font-style="italic"/>
    </style:style>
    <style:style style:name="font:garamond:italic:para" style:family="paragraph" style:parent-style-name="Text_20_body">
      <style:text-properties fo:font-family="Garamond" fo:font-style="italic"/>
    </style:style>
    <style:style style:name="font:garamond:bold" style:family="text">
      <style:text-properties fo:font-family="Garamond" fo:font-weight="bold"/>
    </style:style>
    <style:style style:name="font:garamond:bold:para" style:family="paragraph" style:parent-style-name="Text_20_body">
      <style:text-properties fo:font-family="Garamond" fo:font-weight="bold"/>
    </style:style>
    <style:style style:name="font:garamond:bold-italic" style:family="text">
      <style:text-properties fo:font-family="Garamond" fo:font-style="italic" fo:font-weight="bold"/>
    </style:style>
    <style:style style:name="font:garamond:bold-italic:para" style:family="paragraph" style:parent-style-name="Text_20_body">
      <style:text-properties fo:font-family="Garamond" fo:font-style="italic" fo:font-weight="bold"/>
    </style:style>
    <style:style style:name="font:georgia:italic" style:family="text">
      <style:text-properties fo:font-family="Georgia" fo:font-style="italic"/>
    </style:style>
    <style:style style:name="font:georgia:italic:para" style:family="paragraph" style:parent-style-name="Text_20_body">
      <style:text-properties fo:font-family="Georgia" fo:font-style="italic"/>
    </style:style>
    <style:style style:name="font:georgia:bold" style:family="text">
      <style:text-properties fo:font-family="Georgia" fo:font-weight="bold"/>
    </style:style>
    <style:style style:name="font:georgia:bold:para" style:family="paragraph" style:parent-style-name="Text_20_body">
      <style:text-properties fo:font-family="Georgia" fo:font-weight="bold"/>
    </style:style>
    <style:style style:name="font:georgia:bold-italic" style:family="text">
      <style:text-properties fo:font-family="Georgia" fo:font-style="italic" fo:font-weight="bold"/>
    </style:style>
    <style:style style:name="font:georgia:bold-italic:para" style:family="paragraph" style:parent-style-name="Text_20_body">
      <style:text-properties fo:font-family="Georgia" fo:font-style="italic" fo:font-weight="bold"/>
    </style:style>
    <style:style style:name="font:helvetica:italic" style:family="text">
      <style:text-properties fo:font-family="Helvetica" fo:font-style="italic"/>
    </style:style>
    <style:style style:name="font:helvetica:italic:para" style:family="paragraph" style:parent-style-name="Text_20_body">
      <style:text-properties fo:font-family="Helvetica" fo:font-style="italic"/>
    </style:style>
    <style:style style:name="font:helvetica:bold" style:family="text">
      <style:text-properties fo:font-family="Helvetica" fo:font-weight="bold"/>
    </style:style>
    <style:style style:name="font:helvetica:bold:para" style:family="paragraph" style:parent-style-name="Text_20_body">
      <style:text-properties fo:font-family="Helvetica" fo:font-weight="bold"/>
    </style:style>
    <style:style style:name="font:helvetica:bold-italic" style:family="text">
      <style:text-properties fo:font-family="Helvetica" fo:font-style="italic" fo:font-weight="bold"/>
    </style:style>
    <style:style style:name="font:helvetica:bold-italic:para" style:family="paragraph" style:parent-style-name="Text_20_body">
      <style:text-properties fo:font-family="Helvetica" fo:font-style="italic" fo:font-weight="bold"/>
    </style:style>
    <style:style style:name="font:helvetica-neue:italic" style:family="text">
      <style:text-properties fo:font-family="Helvetica Neue" fo:font-style="italic"/>
    </style:style>
    <style:style style:name="font:helvetica-neue:italic:para" style:family="paragraph" style:parent-style-name="Text_20_body">
      <style:text-properties fo:font-family="Helvetica Neue" fo:font-style="italic"/>
    </style:style>
    <style:style style:name="font:helvetica-neue:bold" style:family="text">
      <style:text-properties fo:font-family="Helvetica Neue" fo:font-weight="bold"/>
    </style:style>
    <style:style style:name="font:helvetica-neue:bold:para" style:family="paragraph" style:parent-style-name="Text_20_body">
      <style:text-properties fo:font-family="Helvetica Neue" fo:font-weight="bold"/>
    </style:style>
    <style:style style:name="font:helvetica-neue:bold-italic" style:family="text">
      <style:text-properties fo:font-family="Helvetica Neue" fo:font-style="italic" fo:font-weight="bold"/>
    </style:style>
    <style:style style:name="font:helvetica-neue:bold-italic:para" style:family="paragraph" style:parent-style-name="Text_20_body">
      <style:text-properties fo:font-family="Helvetica Neue" fo:font-style="italic" fo:font-weight="bold"/>
    </style:style>
    <style:style style:name="font:palatino-linotype:italic" style:family="text">
      <style:text-properties fo:font-family="Palatino Linotype" fo:font-style="italic"/>
    </style:style>
    <style:style style:name="font:palatino-linotype:italic:para" style:family="paragraph" style:parent-style-name="Text_20_body">
      <style:text-properties fo:font-family="Palatino Linotype" fo:font-style="italic"/>
    </style:style>
    <style:style style:name="font:palatino-linotype:bold" style:family="text">
      <style:text-properties fo:font-family="Palatino Linotype" fo:font-weight="bold"/>
    </style:style>
    <style:style style:name="font:palatino-linotype:bold:para" style:family="paragraph" style:parent-style-name="Text_20_body">
      <style:text-properties fo:font-family="Palatino Linotype" fo:font-weight="bold"/>
    </style:style>
    <style:style style:name="font:palatino-linotype:bold-italic" style:family="text">
      <style:text-properties fo:font-family="Palatino Linotype" fo:font-style="italic" fo:font-weight="bold"/>
    </style:style>
    <style:style style:name="font:palatino-linotype:bold-italic:para" style:family="paragraph" style:parent-style-name="Text_20_body">
      <style:text-properties fo:font-family="Palatino Linotype" fo:font-style="italic" fo:font-weight="bold"/>
    </style:style>
    <style:style style:name="font:times-new-roman:italic" style:family="text">
      <style:text-properties fo:font-family="Times New Roman" fo:font-style="italic"/>
    </style:style>
    <style:style style:name="font:times-new-roman:italic:para" style:family="paragraph" style:parent-style-name="Text_20_body">
      <style:text-properties fo:font-family="Times New Roman" fo:font-style="italic"/>
    </style:style>
    <style:style style:name="font:times-new-roman:bold" style:family="text">
      <style:text-properties fo:font-family="Times New Roman" fo:font-weight="bold"/>
    </style:style>
    <style:style style:name="font:times-new-roman:bold:para" style:family="paragraph" style:parent-style-name="Text_20_body">
      <style:text-properties fo:font-family="Times New Roman" fo:font-weight="bold"/>
    </style:style>
    <style:style style:name="font:times-new-roman:bold-italic" style:family="text">
      <style:text-properties fo:font-family="Times New Roman" fo:font-style="italic" fo:font-weight="bold"/>
    </style:style>
    <style:style style:name="font:times-new-roman:bold-italic:para" style:family="paragraph" style:parent-style-name="Text_20_body">
      <style:text-properties fo:font-family="Times New Roman" fo:font-style="italic" fo:font-weight="bold"/>
    </style:style>
    <style:style style:name="style:italic:0.6" style:family="text">
      <style:text-properties fo:font-style="italic" fo:font-size="7.2pt"/>
    </style:style>
    <style:style style:name="style:italic:0.6:para" style:family="paragraph" style:parent-style-name="Text_20_body">
      <style:text-properties fo:font-style="italic" fo:font-size="7.2pt"/>
    </style:style>
    <style:style style:name="style:italic:0.7" style:family="text">
      <style:text-properties fo:font-style="italic" fo:font-size="8.4pt"/>
    </style:style>
    <style:style style:name="style:italic:0.7:para" style:family="paragraph" style:parent-style-name="Text_20_body">
      <style:text-properties fo:font-style="italic" fo:font-size="8.4pt"/>
    </style:style>
    <style:style style:name="style:italic:0.8" style:family="text">
      <style:text-properties fo:font-style="italic" fo:font-size="9.6pt"/>
    </style:style>
    <style:style style:name="style:italic:0.8:para" style:family="paragraph" style:parent-style-name="Text_20_body">
      <style:text-properties fo:font-style="italic" fo:font-size="9.6pt"/>
    </style:style>
    <style:style style:name="style:italic:0.9" style:family="text">
      <style:text-properties fo:font-style="italic" fo:font-size="10.8pt"/>
    </style:style>
    <style:style style:name="style:italic:0.9:para" style:family="paragraph" style:parent-style-name="Text_20_body">
      <style:text-properties fo:font-style="italic" fo:font-size="10.8pt"/>
    </style:style>
    <style:style style:name="style:italic:1.0" style:family="text">
      <style:text-properties fo:font-style="italic" fo:font-size="12.0pt"/>
    </style:style>
    <style:style style:name="style:italic:1.0:para" style:family="paragraph" style:parent-style-name="Text_20_body">
      <style:text-properties fo:font-style="italic" fo:font-size="12.0pt"/>
    </style:style>
    <style:style style:name="style:italic:1.2" style:family="text">
      <style:text-properties fo:font-style="italic" fo:font-size="14.4pt"/>
    </style:style>
    <style:style style:name="style:italic:1.2:para" style:family="paragraph" style:parent-style-name="Text_20_body">
      <style:text-properties fo:font-style="italic" fo:font-size="14.4pt"/>
    </style:style>
    <style:style style:name="style:italic:1.44" style:family="text">
      <style:text-properties fo:font-style="italic" fo:font-size="17.3pt"/>
    </style:style>
    <style:style style:name="style:italic:1.44:para" style:family="paragraph" style:parent-style-name="Text_20_body">
      <style:text-properties fo:font-style="italic" fo:font-size="17.3pt"/>
    </style:style>
    <style:style style:name="style:italic:1.728" style:family="text">
      <style:text-properties fo:font-style="italic" fo:font-size="20.7pt"/>
    </style:style>
    <style:style style:name="style:italic:1.728:para" style:family="paragraph" style:parent-style-name="Text_20_body">
      <style:text-properties fo:font-style="italic" fo:font-size="20.7pt"/>
    </style:style>
    <style:style style:name="style:italic:2.074" style:family="text">
      <style:text-properties fo:font-style="italic" fo:font-size="24.9pt"/>
    </style:style>
    <style:style style:name="style:italic:2.074:para" style:family="paragraph" style:parent-style-name="Text_20_body">
      <style:text-properties fo:font-style="italic" fo:font-size="24.9pt"/>
    </style:style>
    <style:style style:name="style:italic:2.488" style:family="text">
      <style:text-properties fo:font-style="italic" fo:font-size="29.9pt"/>
    </style:style>
    <style:style style:name="style:italic:2.488:para" style:family="paragraph" style:parent-style-name="Text_20_body">
      <style:text-properties fo:font-style="italic" fo:font-size="29.9pt"/>
    </style:style>
    <style:style style:name="style:bold:0.6" style:family="text">
      <style:text-properties fo:font-weight="bold" fo:font-size="7.2pt"/>
    </style:style>
    <style:style style:name="style:bold:0.6:para" style:family="paragraph" style:parent-style-name="Text_20_body">
      <style:text-properties fo:font-weight="bold" fo:font-size="7.2pt"/>
    </style:style>
    <style:style style:name="style:bold:0.7" style:family="text">
      <style:text-properties fo:font-weight="bold" fo:font-size="8.4pt"/>
    </style:style>
    <style:style style:name="style:bold:0.7:para" style:family="paragraph" style:parent-style-name="Text_20_body">
      <style:text-properties fo:font-weight="bold" fo:font-size="8.4pt"/>
    </style:style>
    <style:style style:name="style:bold:0.8" style:family="text">
      <style:text-properties fo:font-weight="bold" fo:font-size="9.6pt"/>
    </style:style>
    <style:style style:name="style:bold:0.8:para" style:family="paragraph" style:parent-style-name="Text_20_body">
      <style:text-properties fo:font-weight="bold" fo:font-size="9.6pt"/>
    </style:style>
    <style:style style:name="style:bold:0.9" style:family="text">
      <style:text-properties fo:font-weight="bold" fo:font-size="10.8pt"/>
    </style:style>
    <style:style style:name="style:bold:0.9:para" style:family="paragraph" style:parent-style-name="Text_20_body">
      <style:text-properties fo:font-weight="bold" fo:font-size="10.8pt"/>
    </style:style>
    <style:style style:name="style:bold:1.0" style:family="text">
      <style:text-properties fo:font-weight="bold" fo:font-size="12.0pt"/>
    </style:style>
    <style:style style:name="style:bold:1.0:para" style:family="paragraph" style:parent-style-name="Text_20_body">
      <style:text-properties fo:font-weight="bold" fo:font-size="12.0pt"/>
    </style:style>
    <style:style style:name="style:bold:1.2" style:family="text">
      <style:text-properties fo:font-weight="bold" fo:font-size="14.4pt"/>
    </style:style>
    <style:style style:name="style:bold:1.2:para" style:family="paragraph" style:parent-style-name="Text_20_body">
      <style:text-properties fo:font-weight="bold" fo:font-size="14.4pt"/>
    </style:style>
    <style:style style:name="style:bold:1.44" style:family="text">
      <style:text-properties fo:font-weight="bold" fo:font-size="17.3pt"/>
    </style:style>
    <style:style style:name="style:bold:1.44:para" style:family="paragraph" style:parent-style-name="Text_20_body">
      <style:text-properties fo:font-weight="bold" fo:font-size="17.3pt"/>
    </style:style>
    <style:style style:name="style:bold:1.728" style:family="text">
      <style:text-properties fo:font-weight="bold" fo:font-size="20.7pt"/>
    </style:style>
    <style:style style:name="style:bold:1.728:para" style:family="paragraph" style:parent-style-name="Text_20_body">
      <style:text-properties fo:font-weight="bold" fo:font-size="20.7pt"/>
    </style:style>
    <style:style style:name="style:bold:2.074" style:family="text">
      <style:text-properties fo:font-weight="bold" fo:font-size="24.9pt"/>
    </style:style>
    <style:style style:name="style:bold:2.074:para" style:family="paragraph" style:parent-style-name="Text_20_body">
      <style:text-properties fo:font-weight="bold" fo:font-size="24.9pt"/>
    </style:style>
    <style:style style:name="style:bold:2.488" style:family="text">
      <style:text-properties fo:font-weight="bold" fo:font-size="29.9pt"/>
    </style:style>
    <style:style style:name="style:bold:2.488:para" style:family="paragraph" style:parent-style-name="Text_20_body">
      <style:text-properties fo:font-weight="bold" fo:font-size="29.9pt"/>
    </style:style>
    <style:style style:name="style:bold-italic:0.6" style:family="text">
      <style:text-properties fo:font-style="italic" fo:font-weight="bold" fo:font-size="7.2pt"/>
    </style:style>
    <style:style style:name="style:bold-italic:0.6:para" style:family="paragraph" style:parent-style-name="Text_20_body">
      <style:text-properties fo:font-style="italic" fo:font-weight="bold" fo:font-size="7.2pt"/>
    </style:style>
    <style:style style:name="style:bold-italic:0.7" style:family="text">
      <style:text-properties fo:font-style="italic" fo:font-weight="bold" fo:font-size="8.4pt"/>
    </style:style>
    <style:style style:name="style:bold-italic:0.7:para" style:family="paragraph" style:parent-style-name="Text_20_body">
      <style:text-properties fo:font-style="italic" fo:font-weight="bold" fo:font-size="8.4pt"/>
    </style:style>
    <style:style style:name="style:bold-italic:0.8" style:family="text">
      <style:text-properties fo:font-style="italic" fo:font-weight="bold" fo:font-size="9.6pt"/>
    </style:style>
    <style:style style:name="style:bold-italic:0.8:para" style:family="paragraph" style:parent-style-name="Text_20_body">
      <style:text-properties fo:font-style="italic" fo:font-weight="bold" fo:font-size="9.6pt"/>
    </style:style>
    <style:style style:name="style:bold-italic:0.9" style:family="text">
      <style:text-properties fo:font-style="italic" fo:font-weight="bold" fo:font-size="10.8pt"/>
    </style:style>
    <style:style style:name="style:bold-italic:0.9:para" style:family="paragraph" style:parent-style-name="Text_20_body">
      <style:text-properties fo:font-style="italic" fo:font-weight="bold" fo:font-size="10.8pt"/>
    </style:style>
    <style:style style:name="style:bold-italic:1.0" style:family="text">
      <style:text-properties fo:font-style="italic" fo:font-weight="bold" fo:font-size="12.0pt"/>
    </style:style>
    <style:style style:name="style:bold-italic:1.0:para" style:family="paragraph" style:parent-style-name="Text_20_body">
      <style:text-properties fo:font-style="italic" fo:font-weight="bold" fo:font-size="12.0pt"/>
    </style:style>
    <style:style style:name="style:bold-italic:1.2" style:family="text">
      <style:text-properties fo:font-style="italic" fo:font-weight="bold" fo:font-size="14.4pt"/>
    </style:style>
    <style:style style:name="style:bold-italic:1.2:para" style:family="paragraph" style:parent-style-name="Text_20_body">
      <style:text-properties fo:font-style="italic" fo:font-weight="bold" fo:font-size="14.4pt"/>
    </style:style>
    <style:style style:name="style:bold-italic:1.44" style:family="text">
      <style:text-properties fo:font-style="italic" fo:font-weight="bold" fo:font-size="17.3pt"/>
    </style:style>
    <style:style style:name="style:bold-italic:1.44:para" style:family="paragraph" style:parent-style-name="Text_20_body">
      <style:text-properties fo:font-style="italic" fo:font-weight="bold" fo:font-size="17.3pt"/>
    </style:style>
    <style:style style:name="style:bold-italic:1.728" style:family="text">
      <style:text-properties fo:font-style="italic" fo:font-weight="bold" fo:font-size="20.7pt"/>
    </style:style>
    <style:style style:name="style:bold-italic:1.728:para" style:family="paragraph" style:parent-style-name="Text_20_body">
      <style:text-properties fo:font-style="italic" fo:font-weight="bold" fo:font-size="20.7pt"/>
    </style:style>
    <style:style style:name="style:bold-italic:2.074" style:family="text">
      <style:text-properties fo:font-style="italic" fo:font-weight="bold" fo:font-size="24.9pt"/>
    </style:style>
    <style:style style:name="style:bold-italic:2.074:para" style:family="paragraph" style:parent-style-name="Text_20_body">
      <style:text-properties fo:font-style="italic" fo:font-weight="bold" fo:font-size="24.9pt"/>
    </style:style>
    <style:style style:name="style:bold-italic:2.488" style:family="text">
      <style:text-properties fo:font-style="italic" fo:font-weight="bold" fo:font-size="29.9pt"/>
    </style:style>
    <style:style style:name="style:bold-italic:2.488:para" style:family="paragraph" style:parent-style-name="Text_20_body">
      <style:text-properties fo:font-style="italic" fo:font-weight="bold" fo:font-size="29.9pt"/>
    </style:style>
    <style:style style:name="font:avant-garde:italic:0.6" style:family="text">
      <style:text-properties fo:font-family="Avant Garde" fo:font-style="italic" fo:font-size="7.2pt"/>
    </style:style>
    <style:style style:name="font:avant-garde:italic:0.6:para" style:family="paragraph" style:parent-style-name="Text_20_body">
      <style:text-properties fo:font-family="Avant Garde" fo:font-style="italic" fo:font-size="7.2pt"/>
    </style:style>
    <style:style style:name="font:avant-garde:italic:0.7" style:family="text">
      <style:text-properties fo:font-family="Avant Garde" fo:font-style="italic" fo:font-size="8.4pt"/>
    </style:style>
    <style:style style:name="font:avant-garde:italic:0.7:para" style:family="paragraph" style:parent-style-name="Text_20_body">
      <style:text-properties fo:font-family="Avant Garde" fo:font-style="italic" fo:font-size="8.4pt"/>
    </style:style>
    <style:style style:name="font:avant-garde:italic:0.8" style:family="text">
      <style:text-properties fo:font-family="Avant Garde" fo:font-style="italic" fo:font-size="9.6pt"/>
    </style:style>
    <style:style style:name="font:avant-garde:italic:0.8:para" style:family="paragraph" style:parent-style-name="Text_20_body">
      <style:text-properties fo:font-family="Avant Garde" fo:font-style="italic" fo:font-size="9.6pt"/>
    </style:style>
    <style:style style:name="font:avant-garde:italic:0.9" style:family="text">
      <style:text-properties fo:font-family="Avant Garde" fo:font-style="italic" fo:font-size="10.8pt"/>
    </style:style>
    <style:style style:name="font:avant-garde:italic:0.9:para" style:family="paragraph" style:parent-style-name="Text_20_body">
      <style:text-properties fo:font-family="Avant Garde" fo:font-style="italic" fo:font-size="10.8pt"/>
    </style:style>
    <style:style style:name="font:avant-garde:italic:1.0" style:family="text">
      <style:text-properties fo:font-family="Avant Garde" fo:font-style="italic" fo:font-size="12.0pt"/>
    </style:style>
    <style:style style:name="font:avant-garde:italic:1.0:para" style:family="paragraph" style:parent-style-name="Text_20_body">
      <style:text-properties fo:font-family="Avant Garde" fo:font-style="italic" fo:font-size="12.0pt"/>
    </style:style>
    <style:style style:name="font:avant-garde:italic:1.2" style:family="text">
      <style:text-properties fo:font-family="Avant Garde" fo:font-style="italic" fo:font-size="14.4pt"/>
    </style:style>
    <style:style style:name="font:avant-garde:italic:1.2:para" style:family="paragraph" style:parent-style-name="Text_20_body">
      <style:text-properties fo:font-family="Avant Garde" fo:font-style="italic" fo:font-size="14.4pt"/>
    </style:style>
    <style:style style:name="font:avant-garde:italic:1.44" style:family="text">
      <style:text-properties fo:font-family="Avant Garde" fo:font-style="italic" fo:font-size="17.3pt"/>
    </style:style>
    <style:style style:name="font:avant-garde:italic:1.44:para" style:family="paragraph" style:parent-style-name="Text_20_body">
      <style:text-properties fo:font-family="Avant Garde" fo:font-style="italic" fo:font-size="17.3pt"/>
    </style:style>
    <style:style style:name="font:avant-garde:italic:1.728" style:family="text">
      <style:text-properties fo:font-family="Avant Garde" fo:font-style="italic" fo:font-size="20.7pt"/>
    </style:style>
    <style:style style:name="font:avant-garde:italic:1.728:para" style:family="paragraph" style:parent-style-name="Text_20_body">
      <style:text-properties fo:font-family="Avant Garde" fo:font-style="italic" fo:font-size="20.7pt"/>
    </style:style>
    <style:style style:name="font:avant-garde:italic:2.074" style:family="text">
      <style:text-properties fo:font-family="Avant Garde" fo:font-style="italic" fo:font-size="24.9pt"/>
    </style:style>
    <style:style style:name="font:avant-garde:italic:2.074:para" style:family="paragraph" style:parent-style-name="Text_20_body">
      <style:text-properties fo:font-family="Avant Garde" fo:font-style="italic" fo:font-size="24.9pt"/>
    </style:style>
    <style:style style:name="font:avant-garde:italic:2.488" style:family="text">
      <style:text-properties fo:font-family="Avant Garde" fo:font-style="italic" fo:font-size="29.9pt"/>
    </style:style>
    <style:style style:name="font:avant-garde:italic:2.488:para" style:family="paragraph" style:parent-style-name="Text_20_body">
      <style:text-properties fo:font-family="Avant Garde" fo:font-style="italic" fo:font-size="29.9pt"/>
    </style:style>
    <style:style style:name="font:avant-garde:bold:0.6" style:family="text">
      <style:text-properties fo:font-family="Avant Garde" fo:font-weight="bold" fo:font-size="7.2pt"/>
    </style:style>
    <style:style style:name="font:avant-garde:bold:0.6:para" style:family="paragraph" style:parent-style-name="Text_20_body">
      <style:text-properties fo:font-family="Avant Garde" fo:font-weight="bold" fo:font-size="7.2pt"/>
    </style:style>
    <style:style style:name="font:avant-garde:bold:0.7" style:family="text">
      <style:text-properties fo:font-family="Avant Garde" fo:font-weight="bold" fo:font-size="8.4pt"/>
    </style:style>
    <style:style style:name="font:avant-garde:bold:0.7:para" style:family="paragraph" style:parent-style-name="Text_20_body">
      <style:text-properties fo:font-family="Avant Garde" fo:font-weight="bold" fo:font-size="8.4pt"/>
    </style:style>
    <style:style style:name="font:avant-garde:bold:0.8" style:family="text">
      <style:text-properties fo:font-family="Avant Garde" fo:font-weight="bold" fo:font-size="9.6pt"/>
    </style:style>
    <style:style style:name="font:avant-garde:bold:0.8:para" style:family="paragraph" style:parent-style-name="Text_20_body">
      <style:text-properties fo:font-family="Avant Garde" fo:font-weight="bold" fo:font-size="9.6pt"/>
    </style:style>
    <style:style style:name="font:avant-garde:bold:0.9" style:family="text">
      <style:text-properties fo:font-family="Avant Garde" fo:font-weight="bold" fo:font-size="10.8pt"/>
    </style:style>
    <style:style style:name="font:avant-garde:bold:0.9:para" style:family="paragraph" style:parent-style-name="Text_20_body">
      <style:text-properties fo:font-family="Avant Garde" fo:font-weight="bold" fo:font-size="10.8pt"/>
    </style:style>
    <style:style style:name="font:avant-garde:bold:1.0" style:family="text">
      <style:text-properties fo:font-family="Avant Garde" fo:font-weight="bold" fo:font-size="12.0pt"/>
    </style:style>
    <style:style style:name="font:avant-garde:bold:1.0:para" style:family="paragraph" style:parent-style-name="Text_20_body">
      <style:text-properties fo:font-family="Avant Garde" fo:font-weight="bold" fo:font-size="12.0pt"/>
    </style:style>
    <style:style style:name="font:avant-garde:bold:1.2" style:family="text">
      <style:text-properties fo:font-family="Avant Garde" fo:font-weight="bold" fo:font-size="14.4pt"/>
    </style:style>
    <style:style style:name="font:avant-garde:bold:1.2:para" style:family="paragraph" style:parent-style-name="Text_20_body">
      <style:text-properties fo:font-family="Avant Garde" fo:font-weight="bold" fo:font-size="14.4pt"/>
    </style:style>
    <style:style style:name="font:avant-garde:bold:1.44" style:family="text">
      <style:text-properties fo:font-family="Avant Garde" fo:font-weight="bold" fo:font-size="17.3pt"/>
    </style:style>
    <style:style style:name="font:avant-garde:bold:1.44:para" style:family="paragraph" style:parent-style-name="Text_20_body">
      <style:text-properties fo:font-family="Avant Garde" fo:font-weight="bold" fo:font-size="17.3pt"/>
    </style:style>
    <style:style style:name="font:avant-garde:bold:1.728" style:family="text">
      <style:text-properties fo:font-family="Avant Garde" fo:font-weight="bold" fo:font-size="20.7pt"/>
    </style:style>
    <style:style style:name="font:avant-garde:bold:1.728:para" style:family="paragraph" style:parent-style-name="Text_20_body">
      <style:text-properties fo:font-family="Avant Garde" fo:font-weight="bold" fo:font-size="20.7pt"/>
    </style:style>
    <style:style style:name="font:avant-garde:bold:2.074" style:family="text">
      <style:text-properties fo:font-family="Avant Garde" fo:font-weight="bold" fo:font-size="24.9pt"/>
    </style:style>
    <style:style style:name="font:avant-garde:bold:2.074:para" style:family="paragraph" style:parent-style-name="Text_20_body">
      <style:text-properties fo:font-family="Avant Garde" fo:font-weight="bold" fo:font-size="24.9pt"/>
    </style:style>
    <style:style style:name="font:avant-garde:bold:2.488" style:family="text">
      <style:text-properties fo:font-family="Avant Garde" fo:font-weight="bold" fo:font-size="29.9pt"/>
    </style:style>
    <style:style style:name="font:avant-garde:bold:2.488:para" style:family="paragraph" style:parent-style-name="Text_20_body">
      <style:text-properties fo:font-family="Avant Garde" fo:font-weight="bold" fo:font-size="29.9pt"/>
    </style:style>
    <style:style style:name="font:avant-garde:bold-italic:0.6" style:family="text">
      <style:text-properties fo:font-family="Avant Garde" fo:font-style="italic" fo:font-weight="bold" fo:font-size="7.2pt"/>
    </style:style>
    <style:style style:name="font:avant-garde:bold-italic:0.6:para" style:family="paragraph" style:parent-style-name="Text_20_body">
      <style:text-properties fo:font-family="Avant Garde" fo:font-style="italic" fo:font-weight="bold" fo:font-size="7.2pt"/>
    </style:style>
    <style:style style:name="font:avant-garde:bold-italic:0.7" style:family="text">
      <style:text-properties fo:font-family="Avant Garde" fo:font-style="italic" fo:font-weight="bold" fo:font-size="8.4pt"/>
    </style:style>
    <style:style style:name="font:avant-garde:bold-italic:0.7:para" style:family="paragraph" style:parent-style-name="Text_20_body">
      <style:text-properties fo:font-family="Avant Garde" fo:font-style="italic" fo:font-weight="bold" fo:font-size="8.4pt"/>
    </style:style>
    <style:style style:name="font:avant-garde:bold-italic:0.8" style:family="text">
      <style:text-properties fo:font-family="Avant Garde" fo:font-style="italic" fo:font-weight="bold" fo:font-size="9.6pt"/>
    </style:style>
    <style:style style:name="font:avant-garde:bold-italic:0.8:para" style:family="paragraph" style:parent-style-name="Text_20_body">
      <style:text-properties fo:font-family="Avant Garde" fo:font-style="italic" fo:font-weight="bold" fo:font-size="9.6pt"/>
    </style:style>
    <style:style style:name="font:avant-garde:bold-italic:0.9" style:family="text">
      <style:text-properties fo:font-family="Avant Garde" fo:font-style="italic" fo:font-weight="bold" fo:font-size="10.8pt"/>
    </style:style>
    <style:style style:name="font:avant-garde:bold-italic:0.9:para" style:family="paragraph" style:parent-style-name="Text_20_body">
      <style:text-properties fo:font-family="Avant Garde" fo:font-style="italic" fo:font-weight="bold" fo:font-size="10.8pt"/>
    </style:style>
    <style:style style:name="font:avant-garde:bold-italic:1.0" style:family="text">
      <style:text-properties fo:font-family="Avant Garde" fo:font-style="italic" fo:font-weight="bold" fo:font-size="12.0pt"/>
    </style:style>
    <style:style style:name="font:avant-garde:bold-italic:1.0:para" style:family="paragraph" style:parent-style-name="Text_20_body">
      <style:text-properties fo:font-family="Avant Garde" fo:font-style="italic" fo:font-weight="bold" fo:font-size="12.0pt"/>
    </style:style>
    <style:style style:name="font:avant-garde:bold-italic:1.2" style:family="text">
      <style:text-properties fo:font-family="Avant Garde" fo:font-style="italic" fo:font-weight="bold" fo:font-size="14.4pt"/>
    </style:style>
    <style:style style:name="font:avant-garde:bold-italic:1.2:para" style:family="paragraph" style:parent-style-name="Text_20_body">
      <style:text-properties fo:font-family="Avant Garde" fo:font-style="italic" fo:font-weight="bold" fo:font-size="14.4pt"/>
    </style:style>
    <style:style style:name="font:avant-garde:bold-italic:1.44" style:family="text">
      <style:text-properties fo:font-family="Avant Garde" fo:font-style="italic" fo:font-weight="bold" fo:font-size="17.3pt"/>
    </style:style>
    <style:style style:name="font:avant-garde:bold-italic:1.44:para" style:family="paragraph" style:parent-style-name="Text_20_body">
      <style:text-properties fo:font-family="Avant Garde" fo:font-style="italic" fo:font-weight="bold" fo:font-size="17.3pt"/>
    </style:style>
    <style:style style:name="font:avant-garde:bold-italic:1.728" style:family="text">
      <style:text-properties fo:font-family="Avant Garde" fo:font-style="italic" fo:font-weight="bold" fo:font-size="20.7pt"/>
    </style:style>
    <style:style style:name="font:avant-garde:bold-italic:1.728:para" style:family="paragraph" style:parent-style-name="Text_20_body">
      <style:text-properties fo:font-family="Avant Garde" fo:font-style="italic" fo:font-weight="bold" fo:font-size="20.7pt"/>
    </style:style>
    <style:style style:name="font:avant-garde:bold-italic:2.074" style:family="text">
      <style:text-properties fo:font-family="Avant Garde" fo:font-style="italic" fo:font-weight="bold" fo:font-size="24.9pt"/>
    </style:style>
    <style:style style:name="font:avant-garde:bold-italic:2.074:para" style:family="paragraph" style:parent-style-name="Text_20_body">
      <style:text-properties fo:font-family="Avant Garde" fo:font-style="italic" fo:font-weight="bold" fo:font-size="24.9pt"/>
    </style:style>
    <style:style style:name="font:avant-garde:bold-italic:2.488" style:family="text">
      <style:text-properties fo:font-family="Avant Garde" fo:font-style="italic" fo:font-weight="bold" fo:font-size="29.9pt"/>
    </style:style>
    <style:style style:name="font:avant-garde:bold-italic:2.488:para" style:family="paragraph" style:parent-style-name="Text_20_body">
      <style:text-properties fo:font-family="Avant Garde" fo:font-style="italic" fo:font-weight="bold" fo:font-size="29.9pt"/>
    </style:style>
    <style:style style:name="font:bookman-old-style:italic:0.6" style:family="text">
      <style:text-properties fo:font-family="Bookman Old Style" fo:font-style="italic" fo:font-size="7.2pt"/>
    </style:style>
    <style:style style:name="font:bookman-old-style:italic:0.6:para" style:family="paragraph" style:parent-style-name="Text_20_body">
      <style:text-properties fo:font-family="Bookman Old Style" fo:font-style="italic" fo:font-size="7.2pt"/>
    </style:style>
    <style:style style:name="font:bookman-old-style:italic:0.7" style:family="text">
      <style:text-properties fo:font-family="Bookman Old Style" fo:font-style="italic" fo:font-size="8.4pt"/>
    </style:style>
    <style:style style:name="font:bookman-old-style:italic:0.7:para" style:family="paragraph" style:parent-style-name="Text_20_body">
      <style:text-properties fo:font-family="Bookman Old Style" fo:font-style="italic" fo:font-size="8.4pt"/>
    </style:style>
    <style:style style:name="font:bookman-old-style:italic:0.8" style:family="text">
      <style:text-properties fo:font-family="Bookman Old Style" fo:font-style="italic" fo:font-size="9.6pt"/>
    </style:style>
    <style:style style:name="font:bookman-old-style:italic:0.8:para" style:family="paragraph" style:parent-style-name="Text_20_body">
      <style:text-properties fo:font-family="Bookman Old Style" fo:font-style="italic" fo:font-size="9.6pt"/>
    </style:style>
    <style:style style:name="font:bookman-old-style:italic:0.9" style:family="text">
      <style:text-properties fo:font-family="Bookman Old Style" fo:font-style="italic" fo:font-size="10.8pt"/>
    </style:style>
    <style:style style:name="font:bookman-old-style:italic:0.9:para" style:family="paragraph" style:parent-style-name="Text_20_body">
      <style:text-properties fo:font-family="Bookman Old Style" fo:font-style="italic" fo:font-size="10.8pt"/>
    </style:style>
    <style:style style:name="font:bookman-old-style:italic:1.0" style:family="text">
      <style:text-properties fo:font-family="Bookman Old Style" fo:font-style="italic" fo:font-size="12.0pt"/>
    </style:style>
    <style:style style:name="font:bookman-old-style:italic:1.0:para" style:family="paragraph" style:parent-style-name="Text_20_body">
      <style:text-properties fo:font-family="Bookman Old Style" fo:font-style="italic" fo:font-size="12.0pt"/>
    </style:style>
    <style:style style:name="font:bookman-old-style:italic:1.2" style:family="text">
      <style:text-properties fo:font-family="Bookman Old Style" fo:font-style="italic" fo:font-size="14.4pt"/>
    </style:style>
    <style:style style:name="font:bookman-old-style:italic:1.2:para" style:family="paragraph" style:parent-style-name="Text_20_body">
      <style:text-properties fo:font-family="Bookman Old Style" fo:font-style="italic" fo:font-size="14.4pt"/>
    </style:style>
    <style:style style:name="font:bookman-old-style:italic:1.44" style:family="text">
      <style:text-properties fo:font-family="Bookman Old Style" fo:font-style="italic" fo:font-size="17.3pt"/>
    </style:style>
    <style:style style:name="font:bookman-old-style:italic:1.44:para" style:family="paragraph" style:parent-style-name="Text_20_body">
      <style:text-properties fo:font-family="Bookman Old Style" fo:font-style="italic" fo:font-size="17.3pt"/>
    </style:style>
    <style:style style:name="font:bookman-old-style:italic:1.728" style:family="text">
      <style:text-properties fo:font-family="Bookman Old Style" fo:font-style="italic" fo:font-size="20.7pt"/>
    </style:style>
    <style:style style:name="font:bookman-old-style:italic:1.728:para" style:family="paragraph" style:parent-style-name="Text_20_body">
      <style:text-properties fo:font-family="Bookman Old Style" fo:font-style="italic" fo:font-size="20.7pt"/>
    </style:style>
    <style:style style:name="font:bookman-old-style:italic:2.074" style:family="text">
      <style:text-properties fo:font-family="Bookman Old Style" fo:font-style="italic" fo:font-size="24.9pt"/>
    </style:style>
    <style:style style:name="font:bookman-old-style:italic:2.074:para" style:family="paragraph" style:parent-style-name="Text_20_body">
      <style:text-properties fo:font-family="Bookman Old Style" fo:font-style="italic" fo:font-size="24.9pt"/>
    </style:style>
    <style:style style:name="font:bookman-old-style:italic:2.488" style:family="text">
      <style:text-properties fo:font-family="Bookman Old Style" fo:font-style="italic" fo:font-size="29.9pt"/>
    </style:style>
    <style:style style:name="font:bookman-old-style:italic:2.488:para" style:family="paragraph" style:parent-style-name="Text_20_body">
      <style:text-properties fo:font-family="Bookman Old Style" fo:font-style="italic" fo:font-size="29.9pt"/>
    </style:style>
    <style:style style:name="font:bookman-old-style:bold:0.6" style:family="text">
      <style:text-properties fo:font-family="Bookman Old Style" fo:font-weight="bold" fo:font-size="7.2pt"/>
    </style:style>
    <style:style style:name="font:bookman-old-style:bold:0.6:para" style:family="paragraph" style:parent-style-name="Text_20_body">
      <style:text-properties fo:font-family="Bookman Old Style" fo:font-weight="bold" fo:font-size="7.2pt"/>
    </style:style>
    <style:style style:name="font:bookman-old-style:bold:0.7" style:family="text">
      <style:text-properties fo:font-family="Bookman Old Style" fo:font-weight="bold" fo:font-size="8.4pt"/>
    </style:style>
    <style:style style:name="font:bookman-old-style:bold:0.7:para" style:family="paragraph" style:parent-style-name="Text_20_body">
      <style:text-properties fo:font-family="Bookman Old Style" fo:font-weight="bold" fo:font-size="8.4pt"/>
    </style:style>
    <style:style style:name="font:bookman-old-style:bold:0.8" style:family="text">
      <style:text-properties fo:font-family="Bookman Old Style" fo:font-weight="bold" fo:font-size="9.6pt"/>
    </style:style>
    <style:style style:name="font:bookman-old-style:bold:0.8:para" style:family="paragraph" style:parent-style-name="Text_20_body">
      <style:text-properties fo:font-family="Bookman Old Style" fo:font-weight="bold" fo:font-size="9.6pt"/>
    </style:style>
    <style:style style:name="font:bookman-old-style:bold:0.9" style:family="text">
      <style:text-properties fo:font-family="Bookman Old Style" fo:font-weight="bold" fo:font-size="10.8pt"/>
    </style:style>
    <style:style style:name="font:bookman-old-style:bold:0.9:para" style:family="paragraph" style:parent-style-name="Text_20_body">
      <style:text-properties fo:font-family="Bookman Old Style" fo:font-weight="bold" fo:font-size="10.8pt"/>
    </style:style>
    <style:style style:name="font:bookman-old-style:bold:1.0" style:family="text">
      <style:text-properties fo:font-family="Bookman Old Style" fo:font-weight="bold" fo:font-size="12.0pt"/>
    </style:style>
    <style:style style:name="font:bookman-old-style:bold:1.0:para" style:family="paragraph" style:parent-style-name="Text_20_body">
      <style:text-properties fo:font-family="Bookman Old Style" fo:font-weight="bold" fo:font-size="12.0pt"/>
    </style:style>
    <style:style style:name="font:bookman-old-style:bold:1.2" style:family="text">
      <style:text-properties fo:font-family="Bookman Old Style" fo:font-weight="bold" fo:font-size="14.4pt"/>
    </style:style>
    <style:style style:name="font:bookman-old-style:bold:1.2:para" style:family="paragraph" style:parent-style-name="Text_20_body">
      <style:text-properties fo:font-family="Bookman Old Style" fo:font-weight="bold" fo:font-size="14.4pt"/>
    </style:style>
    <style:style style:name="font:bookman-old-style:bold:1.44" style:family="text">
      <style:text-properties fo:font-family="Bookman Old Style" fo:font-weight="bold" fo:font-size="17.3pt"/>
    </style:style>
    <style:style style:name="font:bookman-old-style:bold:1.44:para" style:family="paragraph" style:parent-style-name="Text_20_body">
      <style:text-properties fo:font-family="Bookman Old Style" fo:font-weight="bold" fo:font-size="17.3pt"/>
    </style:style>
    <style:style style:name="font:bookman-old-style:bold:1.728" style:family="text">
      <style:text-properties fo:font-family="Bookman Old Style" fo:font-weight="bold" fo:font-size="20.7pt"/>
    </style:style>
    <style:style style:name="font:bookman-old-style:bold:1.728:para" style:family="paragraph" style:parent-style-name="Text_20_body">
      <style:text-properties fo:font-family="Bookman Old Style" fo:font-weight="bold" fo:font-size="20.7pt"/>
    </style:style>
    <style:style style:name="font:bookman-old-style:bold:2.074" style:family="text">
      <style:text-properties fo:font-family="Bookman Old Style" fo:font-weight="bold" fo:font-size="24.9pt"/>
    </style:style>
    <style:style style:name="font:bookman-old-style:bold:2.074:para" style:family="paragraph" style:parent-style-name="Text_20_body">
      <style:text-properties fo:font-family="Bookman Old Style" fo:font-weight="bold" fo:font-size="24.9pt"/>
    </style:style>
    <style:style style:name="font:bookman-old-style:bold:2.488" style:family="text">
      <style:text-properties fo:font-family="Bookman Old Style" fo:font-weight="bold" fo:font-size="29.9pt"/>
    </style:style>
    <style:style style:name="font:bookman-old-style:bold:2.488:para" style:family="paragraph" style:parent-style-name="Text_20_body">
      <style:text-properties fo:font-family="Bookman Old Style" fo:font-weight="bold" fo:font-size="29.9pt"/>
    </style:style>
    <style:style style:name="font:bookman-old-style:bold-italic:0.6" style:family="text">
      <style:text-properties fo:font-family="Bookman Old Style" fo:font-style="italic" fo:font-weight="bold" fo:font-size="7.2pt"/>
    </style:style>
    <style:style style:name="font:bookman-old-style:bold-italic:0.6:para" style:family="paragraph" style:parent-style-name="Text_20_body">
      <style:text-properties fo:font-family="Bookman Old Style" fo:font-style="italic" fo:font-weight="bold" fo:font-size="7.2pt"/>
    </style:style>
    <style:style style:name="font:bookman-old-style:bold-italic:0.7" style:family="text">
      <style:text-properties fo:font-family="Bookman Old Style" fo:font-style="italic" fo:font-weight="bold" fo:font-size="8.4pt"/>
    </style:style>
    <style:style style:name="font:bookman-old-style:bold-italic:0.7:para" style:family="paragraph" style:parent-style-name="Text_20_body">
      <style:text-properties fo:font-family="Bookman Old Style" fo:font-style="italic" fo:font-weight="bold" fo:font-size="8.4pt"/>
    </style:style>
    <style:style style:name="font:bookman-old-style:bold-italic:0.8" style:family="text">
      <style:text-properties fo:font-family="Bookman Old Style" fo:font-style="italic" fo:font-weight="bold" fo:font-size="9.6pt"/>
    </style:style>
    <style:style style:name="font:bookman-old-style:bold-italic:0.8:para" style:family="paragraph" style:parent-style-name="Text_20_body">
      <style:text-properties fo:font-family="Bookman Old Style" fo:font-style="italic" fo:font-weight="bold" fo:font-size="9.6pt"/>
    </style:style>
    <style:style style:name="font:bookman-old-style:bold-italic:0.9" style:family="text">
      <style:text-properties fo:font-family="Bookman Old Style" fo:font-style="italic" fo:font-weight="bold" fo:font-size="10.8pt"/>
    </style:style>
    <style:style style:name="font:bookman-old-style:bold-italic:0.9:para" style:family="paragraph" style:parent-style-name="Text_20_body">
      <style:text-properties fo:font-family="Bookman Old Style" fo:font-style="italic" fo:font-weight="bold" fo:font-size="10.8pt"/>
    </style:style>
    <style:style style:name="font:bookman-old-style:bold-italic:1.0" style:family="text">
      <style:text-properties fo:font-family="Bookman Old Style" fo:font-style="italic" fo:font-weight="bold" fo:font-size="12.0pt"/>
    </style:style>
    <style:style style:name="font:bookman-old-style:bold-italic:1.0:para" style:family="paragraph" style:parent-style-name="Text_20_body">
      <style:text-properties fo:font-family="Bookman Old Style" fo:font-style="italic" fo:font-weight="bold" fo:font-size="12.0pt"/>
    </style:style>
    <style:style style:name="font:bookman-old-style:bold-italic:1.2" style:family="text">
      <style:text-properties fo:font-family="Bookman Old Style" fo:font-style="italic" fo:font-weight="bold" fo:font-size="14.4pt"/>
    </style:style>
    <style:style style:name="font:bookman-old-style:bold-italic:1.2:para" style:family="paragraph" style:parent-style-name="Text_20_body">
      <style:text-properties fo:font-family="Bookman Old Style" fo:font-style="italic" fo:font-weight="bold" fo:font-size="14.4pt"/>
    </style:style>
    <style:style style:name="font:bookman-old-style:bold-italic:1.44" style:family="text">
      <style:text-properties fo:font-family="Bookman Old Style" fo:font-style="italic" fo:font-weight="bold" fo:font-size="17.3pt"/>
    </style:style>
    <style:style style:name="font:bookman-old-style:bold-italic:1.44:para" style:family="paragraph" style:parent-style-name="Text_20_body">
      <style:text-properties fo:font-family="Bookman Old Style" fo:font-style="italic" fo:font-weight="bold" fo:font-size="17.3pt"/>
    </style:style>
    <style:style style:name="font:bookman-old-style:bold-italic:1.728" style:family="text">
      <style:text-properties fo:font-family="Bookman Old Style" fo:font-style="italic" fo:font-weight="bold" fo:font-size="20.7pt"/>
    </style:style>
    <style:style style:name="font:bookman-old-style:bold-italic:1.728:para" style:family="paragraph" style:parent-style-name="Text_20_body">
      <style:text-properties fo:font-family="Bookman Old Style" fo:font-style="italic" fo:font-weight="bold" fo:font-size="20.7pt"/>
    </style:style>
    <style:style style:name="font:bookman-old-style:bold-italic:2.074" style:family="text">
      <style:text-properties fo:font-family="Bookman Old Style" fo:font-style="italic" fo:font-weight="bold" fo:font-size="24.9pt"/>
    </style:style>
    <style:style style:name="font:bookman-old-style:bold-italic:2.074:para" style:family="paragraph" style:parent-style-name="Text_20_body">
      <style:text-properties fo:font-family="Bookman Old Style" fo:font-style="italic" fo:font-weight="bold" fo:font-size="24.9pt"/>
    </style:style>
    <style:style style:name="font:bookman-old-style:bold-italic:2.488" style:family="text">
      <style:text-properties fo:font-family="Bookman Old Style" fo:font-style="italic" fo:font-weight="bold" fo:font-size="29.9pt"/>
    </style:style>
    <style:style style:name="font:bookman-old-style:bold-italic:2.488:para" style:family="paragraph" style:parent-style-name="Text_20_body">
      <style:text-properties fo:font-family="Bookman Old Style" fo:font-style="italic" fo:font-weight="bold" fo:font-size="29.9pt"/>
    </style:style>
    <style:style style:name="font:century-schoolbook:italic:0.6" style:family="text">
      <style:text-properties fo:font-family="Century Schoolbook" fo:font-style="italic" fo:font-size="7.2pt"/>
    </style:style>
    <style:style style:name="font:century-schoolbook:italic:0.6:para" style:family="paragraph" style:parent-style-name="Text_20_body">
      <style:text-properties fo:font-family="Century Schoolbook" fo:font-style="italic" fo:font-size="7.2pt"/>
    </style:style>
    <style:style style:name="font:century-schoolbook:italic:0.7" style:family="text">
      <style:text-properties fo:font-family="Century Schoolbook" fo:font-style="italic" fo:font-size="8.4pt"/>
    </style:style>
    <style:style style:name="font:century-schoolbook:italic:0.7:para" style:family="paragraph" style:parent-style-name="Text_20_body">
      <style:text-properties fo:font-family="Century Schoolbook" fo:font-style="italic" fo:font-size="8.4pt"/>
    </style:style>
    <style:style style:name="font:century-schoolbook:italic:0.8" style:family="text">
      <style:text-properties fo:font-family="Century Schoolbook" fo:font-style="italic" fo:font-size="9.6pt"/>
    </style:style>
    <style:style style:name="font:century-schoolbook:italic:0.8:para" style:family="paragraph" style:parent-style-name="Text_20_body">
      <style:text-properties fo:font-family="Century Schoolbook" fo:font-style="italic" fo:font-size="9.6pt"/>
    </style:style>
    <style:style style:name="font:century-schoolbook:italic:0.9" style:family="text">
      <style:text-properties fo:font-family="Century Schoolbook" fo:font-style="italic" fo:font-size="10.8pt"/>
    </style:style>
    <style:style style:name="font:century-schoolbook:italic:0.9:para" style:family="paragraph" style:parent-style-name="Text_20_body">
      <style:text-properties fo:font-family="Century Schoolbook" fo:font-style="italic" fo:font-size="10.8pt"/>
    </style:style>
    <style:style style:name="font:century-schoolbook:italic:1.0" style:family="text">
      <style:text-properties fo:font-family="Century Schoolbook" fo:font-style="italic" fo:font-size="12.0pt"/>
    </style:style>
    <style:style style:name="font:century-schoolbook:italic:1.0:para" style:family="paragraph" style:parent-style-name="Text_20_body">
      <style:text-properties fo:font-family="Century Schoolbook" fo:font-style="italic" fo:font-size="12.0pt"/>
    </style:style>
    <style:style style:name="font:century-schoolbook:italic:1.2" style:family="text">
      <style:text-properties fo:font-family="Century Schoolbook" fo:font-style="italic" fo:font-size="14.4pt"/>
    </style:style>
    <style:style style:name="font:century-schoolbook:italic:1.2:para" style:family="paragraph" style:parent-style-name="Text_20_body">
      <style:text-properties fo:font-family="Century Schoolbook" fo:font-style="italic" fo:font-size="14.4pt"/>
    </style:style>
    <style:style style:name="font:century-schoolbook:italic:1.44" style:family="text">
      <style:text-properties fo:font-family="Century Schoolbook" fo:font-style="italic" fo:font-size="17.3pt"/>
    </style:style>
    <style:style style:name="font:century-schoolbook:italic:1.44:para" style:family="paragraph" style:parent-style-name="Text_20_body">
      <style:text-properties fo:font-family="Century Schoolbook" fo:font-style="italic" fo:font-size="17.3pt"/>
    </style:style>
    <style:style style:name="font:century-schoolbook:italic:1.728" style:family="text">
      <style:text-properties fo:font-family="Century Schoolbook" fo:font-style="italic" fo:font-size="20.7pt"/>
    </style:style>
    <style:style style:name="font:century-schoolbook:italic:1.728:para" style:family="paragraph" style:parent-style-name="Text_20_body">
      <style:text-properties fo:font-family="Century Schoolbook" fo:font-style="italic" fo:font-size="20.7pt"/>
    </style:style>
    <style:style style:name="font:century-schoolbook:italic:2.074" style:family="text">
      <style:text-properties fo:font-family="Century Schoolbook" fo:font-style="italic" fo:font-size="24.9pt"/>
    </style:style>
    <style:style style:name="font:century-schoolbook:italic:2.074:para" style:family="paragraph" style:parent-style-name="Text_20_body">
      <style:text-properties fo:font-family="Century Schoolbook" fo:font-style="italic" fo:font-size="24.9pt"/>
    </style:style>
    <style:style style:name="font:century-schoolbook:italic:2.488" style:family="text">
      <style:text-properties fo:font-family="Century Schoolbook" fo:font-style="italic" fo:font-size="29.9pt"/>
    </style:style>
    <style:style style:name="font:century-schoolbook:italic:2.488:para" style:family="paragraph" style:parent-style-name="Text_20_body">
      <style:text-properties fo:font-family="Century Schoolbook" fo:font-style="italic" fo:font-size="29.9pt"/>
    </style:style>
    <style:style style:name="font:century-schoolbook:bold:0.6" style:family="text">
      <style:text-properties fo:font-family="Century Schoolbook" fo:font-weight="bold" fo:font-size="7.2pt"/>
    </style:style>
    <style:style style:name="font:century-schoolbook:bold:0.6:para" style:family="paragraph" style:parent-style-name="Text_20_body">
      <style:text-properties fo:font-family="Century Schoolbook" fo:font-weight="bold" fo:font-size="7.2pt"/>
    </style:style>
    <style:style style:name="font:century-schoolbook:bold:0.7" style:family="text">
      <style:text-properties fo:font-family="Century Schoolbook" fo:font-weight="bold" fo:font-size="8.4pt"/>
    </style:style>
    <style:style style:name="font:century-schoolbook:bold:0.7:para" style:family="paragraph" style:parent-style-name="Text_20_body">
      <style:text-properties fo:font-family="Century Schoolbook" fo:font-weight="bold" fo:font-size="8.4pt"/>
    </style:style>
    <style:style style:name="font:century-schoolbook:bold:0.8" style:family="text">
      <style:text-properties fo:font-family="Century Schoolbook" fo:font-weight="bold" fo:font-size="9.6pt"/>
    </style:style>
    <style:style style:name="font:century-schoolbook:bold:0.8:para" style:family="paragraph" style:parent-style-name="Text_20_body">
      <style:text-properties fo:font-family="Century Schoolbook" fo:font-weight="bold" fo:font-size="9.6pt"/>
    </style:style>
    <style:style style:name="font:century-schoolbook:bold:0.9" style:family="text">
      <style:text-properties fo:font-family="Century Schoolbook" fo:font-weight="bold" fo:font-size="10.8pt"/>
    </style:style>
    <style:style style:name="font:century-schoolbook:bold:0.9:para" style:family="paragraph" style:parent-style-name="Text_20_body">
      <style:text-properties fo:font-family="Century Schoolbook" fo:font-weight="bold" fo:font-size="10.8pt"/>
    </style:style>
    <style:style style:name="font:century-schoolbook:bold:1.0" style:family="text">
      <style:text-properties fo:font-family="Century Schoolbook" fo:font-weight="bold" fo:font-size="12.0pt"/>
    </style:style>
    <style:style style:name="font:century-schoolbook:bold:1.0:para" style:family="paragraph" style:parent-style-name="Text_20_body">
      <style:text-properties fo:font-family="Century Schoolbook" fo:font-weight="bold" fo:font-size="12.0pt"/>
    </style:style>
    <style:style style:name="font:century-schoolbook:bold:1.2" style:family="text">
      <style:text-properties fo:font-family="Century Schoolbook" fo:font-weight="bold" fo:font-size="14.4pt"/>
    </style:style>
    <style:style style:name="font:century-schoolbook:bold:1.2:para" style:family="paragraph" style:parent-style-name="Text_20_body">
      <style:text-properties fo:font-family="Century Schoolbook" fo:font-weight="bold" fo:font-size="14.4pt"/>
    </style:style>
    <style:style style:name="font:century-schoolbook:bold:1.44" style:family="text">
      <style:text-properties fo:font-family="Century Schoolbook" fo:font-weight="bold" fo:font-size="17.3pt"/>
    </style:style>
    <style:style style:name="font:century-schoolbook:bold:1.44:para" style:family="paragraph" style:parent-style-name="Text_20_body">
      <style:text-properties fo:font-family="Century Schoolbook" fo:font-weight="bold" fo:font-size="17.3pt"/>
    </style:style>
    <style:style style:name="font:century-schoolbook:bold:1.728" style:family="text">
      <style:text-properties fo:font-family="Century Schoolbook" fo:font-weight="bold" fo:font-size="20.7pt"/>
    </style:style>
    <style:style style:name="font:century-schoolbook:bold:1.728:para" style:family="paragraph" style:parent-style-name="Text_20_body">
      <style:text-properties fo:font-family="Century Schoolbook" fo:font-weight="bold" fo:font-size="20.7pt"/>
    </style:style>
    <style:style style:name="font:century-schoolbook:bold:2.074" style:family="text">
      <style:text-properties fo:font-family="Century Schoolbook" fo:font-weight="bold" fo:font-size="24.9pt"/>
    </style:style>
    <style:style style:name="font:century-schoolbook:bold:2.074:para" style:family="paragraph" style:parent-style-name="Text_20_body">
      <style:text-properties fo:font-family="Century Schoolbook" fo:font-weight="bold" fo:font-size="24.9pt"/>
    </style:style>
    <style:style style:name="font:century-schoolbook:bold:2.488" style:family="text">
      <style:text-properties fo:font-family="Century Schoolbook" fo:font-weight="bold" fo:font-size="29.9pt"/>
    </style:style>
    <style:style style:name="font:century-schoolbook:bold:2.488:para" style:family="paragraph" style:parent-style-name="Text_20_body">
      <style:text-properties fo:font-family="Century Schoolbook" fo:font-weight="bold" fo:font-size="29.9pt"/>
    </style:style>
    <style:style style:name="font:century-schoolbook:bold-italic:0.6" style:family="text">
      <style:text-properties fo:font-family="Century Schoolbook" fo:font-style="italic" fo:font-weight="bold" fo:font-size="7.2pt"/>
    </style:style>
    <style:style style:name="font:century-schoolbook:bold-italic:0.6:para" style:family="paragraph" style:parent-style-name="Text_20_body">
      <style:text-properties fo:font-family="Century Schoolbook" fo:font-style="italic" fo:font-weight="bold" fo:font-size="7.2pt"/>
    </style:style>
    <style:style style:name="font:century-schoolbook:bold-italic:0.7" style:family="text">
      <style:text-properties fo:font-family="Century Schoolbook" fo:font-style="italic" fo:font-weight="bold" fo:font-size="8.4pt"/>
    </style:style>
    <style:style style:name="font:century-schoolbook:bold-italic:0.7:para" style:family="paragraph" style:parent-style-name="Text_20_body">
      <style:text-properties fo:font-family="Century Schoolbook" fo:font-style="italic" fo:font-weight="bold" fo:font-size="8.4pt"/>
    </style:style>
    <style:style style:name="font:century-schoolbook:bold-italic:0.8" style:family="text">
      <style:text-properties fo:font-family="Century Schoolbook" fo:font-style="italic" fo:font-weight="bold" fo:font-size="9.6pt"/>
    </style:style>
    <style:style style:name="font:century-schoolbook:bold-italic:0.8:para" style:family="paragraph" style:parent-style-name="Text_20_body">
      <style:text-properties fo:font-family="Century Schoolbook" fo:font-style="italic" fo:font-weight="bold" fo:font-size="9.6pt"/>
    </style:style>
    <style:style style:name="font:century-schoolbook:bold-italic:0.9" style:family="text">
      <style:text-properties fo:font-family="Century Schoolbook" fo:font-style="italic" fo:font-weight="bold" fo:font-size="10.8pt"/>
    </style:style>
    <style:style style:name="font:century-schoolbook:bold-italic:0.9:para" style:family="paragraph" style:parent-style-name="Text_20_body">
      <style:text-properties fo:font-family="Century Schoolbook" fo:font-style="italic" fo:font-weight="bold" fo:font-size="10.8pt"/>
    </style:style>
    <style:style style:name="font:century-schoolbook:bold-italic:1.0" style:family="text">
      <style:text-properties fo:font-family="Century Schoolbook" fo:font-style="italic" fo:font-weight="bold" fo:font-size="12.0pt"/>
    </style:style>
    <style:style style:name="font:century-schoolbook:bold-italic:1.0:para" style:family="paragraph" style:parent-style-name="Text_20_body">
      <style:text-properties fo:font-family="Century Schoolbook" fo:font-style="italic" fo:font-weight="bold" fo:font-size="12.0pt"/>
    </style:style>
    <style:style style:name="font:century-schoolbook:bold-italic:1.2" style:family="text">
      <style:text-properties fo:font-family="Century Schoolbook" fo:font-style="italic" fo:font-weight="bold" fo:font-size="14.4pt"/>
    </style:style>
    <style:style style:name="font:century-schoolbook:bold-italic:1.2:para" style:family="paragraph" style:parent-style-name="Text_20_body">
      <style:text-properties fo:font-family="Century Schoolbook" fo:font-style="italic" fo:font-weight="bold" fo:font-size="14.4pt"/>
    </style:style>
    <style:style style:name="font:century-schoolbook:bold-italic:1.44" style:family="text">
      <style:text-properties fo:font-family="Century Schoolbook" fo:font-style="italic" fo:font-weight="bold" fo:font-size="17.3pt"/>
    </style:style>
    <style:style style:name="font:century-schoolbook:bold-italic:1.44:para" style:family="paragraph" style:parent-style-name="Text_20_body">
      <style:text-properties fo:font-family="Century Schoolbook" fo:font-style="italic" fo:font-weight="bold" fo:font-size="17.3pt"/>
    </style:style>
    <style:style style:name="font:century-schoolbook:bold-italic:1.728" style:family="text">
      <style:text-properties fo:font-family="Century Schoolbook" fo:font-style="italic" fo:font-weight="bold" fo:font-size="20.7pt"/>
    </style:style>
    <style:style style:name="font:century-schoolbook:bold-italic:1.728:para" style:family="paragraph" style:parent-style-name="Text_20_body">
      <style:text-properties fo:font-family="Century Schoolbook" fo:font-style="italic" fo:font-weight="bold" fo:font-size="20.7pt"/>
    </style:style>
    <style:style style:name="font:century-schoolbook:bold-italic:2.074" style:family="text">
      <style:text-properties fo:font-family="Century Schoolbook" fo:font-style="italic" fo:font-weight="bold" fo:font-size="24.9pt"/>
    </style:style>
    <style:style style:name="font:century-schoolbook:bold-italic:2.074:para" style:family="paragraph" style:parent-style-name="Text_20_body">
      <style:text-properties fo:font-family="Century Schoolbook" fo:font-style="italic" fo:font-weight="bold" fo:font-size="24.9pt"/>
    </style:style>
    <style:style style:name="font:century-schoolbook:bold-italic:2.488" style:family="text">
      <style:text-properties fo:font-family="Century Schoolbook" fo:font-style="italic" fo:font-weight="bold" fo:font-size="29.9pt"/>
    </style:style>
    <style:style style:name="font:century-schoolbook:bold-italic:2.488:para" style:family="paragraph" style:parent-style-name="Text_20_body">
      <style:text-properties fo:font-family="Century Schoolbook" fo:font-style="italic" fo:font-weight="bold" fo:font-size="29.9pt"/>
    </style:style>
    <style:style style:name="font:computer-modern:italic:0.6" style:family="text">
      <style:text-properties fo:font-family="Computer Modern" fo:font-style="italic" fo:font-size="7.2pt"/>
    </style:style>
    <style:style style:name="font:computer-modern:italic:0.6:para" style:family="paragraph" style:parent-style-name="Text_20_body">
      <style:text-properties fo:font-family="Computer Modern" fo:font-style="italic" fo:font-size="7.2pt"/>
    </style:style>
    <style:style style:name="font:computer-modern:italic:0.7" style:family="text">
      <style:text-properties fo:font-family="Computer Modern" fo:font-style="italic" fo:font-size="8.4pt"/>
    </style:style>
    <style:style style:name="font:computer-modern:italic:0.7:para" style:family="paragraph" style:parent-style-name="Text_20_body">
      <style:text-properties fo:font-family="Computer Modern" fo:font-style="italic" fo:font-size="8.4pt"/>
    </style:style>
    <style:style style:name="font:computer-modern:italic:0.8" style:family="text">
      <style:text-properties fo:font-family="Computer Modern" fo:font-style="italic" fo:font-size="9.6pt"/>
    </style:style>
    <style:style style:name="font:computer-modern:italic:0.8:para" style:family="paragraph" style:parent-style-name="Text_20_body">
      <style:text-properties fo:font-family="Computer Modern" fo:font-style="italic" fo:font-size="9.6pt"/>
    </style:style>
    <style:style style:name="font:computer-modern:italic:0.9" style:family="text">
      <style:text-properties fo:font-family="Computer Modern" fo:font-style="italic" fo:font-size="10.8pt"/>
    </style:style>
    <style:style style:name="font:computer-modern:italic:0.9:para" style:family="paragraph" style:parent-style-name="Text_20_body">
      <style:text-properties fo:font-family="Computer Modern" fo:font-style="italic" fo:font-size="10.8pt"/>
    </style:style>
    <style:style style:name="font:computer-modern:italic:1.0" style:family="text">
      <style:text-properties fo:font-family="Computer Modern" fo:font-style="italic" fo:font-size="12.0pt"/>
    </style:style>
    <style:style style:name="font:computer-modern:italic:1.0:para" style:family="paragraph" style:parent-style-name="Text_20_body">
      <style:text-properties fo:font-family="Computer Modern" fo:font-style="italic" fo:font-size="12.0pt"/>
    </style:style>
    <style:style style:name="font:computer-modern:italic:1.2" style:family="text">
      <style:text-properties fo:font-family="Computer Modern" fo:font-style="italic" fo:font-size="14.4pt"/>
    </style:style>
    <style:style style:name="font:computer-modern:italic:1.2:para" style:family="paragraph" style:parent-style-name="Text_20_body">
      <style:text-properties fo:font-family="Computer Modern" fo:font-style="italic" fo:font-size="14.4pt"/>
    </style:style>
    <style:style style:name="font:computer-modern:italic:1.44" style:family="text">
      <style:text-properties fo:font-family="Computer Modern" fo:font-style="italic" fo:font-size="17.3pt"/>
    </style:style>
    <style:style style:name="font:computer-modern:italic:1.44:para" style:family="paragraph" style:parent-style-name="Text_20_body">
      <style:text-properties fo:font-family="Computer Modern" fo:font-style="italic" fo:font-size="17.3pt"/>
    </style:style>
    <style:style style:name="font:computer-modern:italic:1.728" style:family="text">
      <style:text-properties fo:font-family="Computer Modern" fo:font-style="italic" fo:font-size="20.7pt"/>
    </style:style>
    <style:style style:name="font:computer-modern:italic:1.728:para" style:family="paragraph" style:parent-style-name="Text_20_body">
      <style:text-properties fo:font-family="Computer Modern" fo:font-style="italic" fo:font-size="20.7pt"/>
    </style:style>
    <style:style style:name="font:computer-modern:italic:2.074" style:family="text">
      <style:text-properties fo:font-family="Computer Modern" fo:font-style="italic" fo:font-size="24.9pt"/>
    </style:style>
    <style:style style:name="font:computer-modern:italic:2.074:para" style:family="paragraph" style:parent-style-name="Text_20_body">
      <style:text-properties fo:font-family="Computer Modern" fo:font-style="italic" fo:font-size="24.9pt"/>
    </style:style>
    <style:style style:name="font:computer-modern:italic:2.488" style:family="text">
      <style:text-properties fo:font-family="Computer Modern" fo:font-style="italic" fo:font-size="29.9pt"/>
    </style:style>
    <style:style style:name="font:computer-modern:italic:2.488:para" style:family="paragraph" style:parent-style-name="Text_20_body">
      <style:text-properties fo:font-family="Computer Modern" fo:font-style="italic" fo:font-size="29.9pt"/>
    </style:style>
    <style:style style:name="font:computer-modern:bold:0.6" style:family="text">
      <style:text-properties fo:font-family="Computer Modern" fo:font-weight="bold" fo:font-size="7.2pt"/>
    </style:style>
    <style:style style:name="font:computer-modern:bold:0.6:para" style:family="paragraph" style:parent-style-name="Text_20_body">
      <style:text-properties fo:font-family="Computer Modern" fo:font-weight="bold" fo:font-size="7.2pt"/>
    </style:style>
    <style:style style:name="font:computer-modern:bold:0.7" style:family="text">
      <style:text-properties fo:font-family="Computer Modern" fo:font-weight="bold" fo:font-size="8.4pt"/>
    </style:style>
    <style:style style:name="font:computer-modern:bold:0.7:para" style:family="paragraph" style:parent-style-name="Text_20_body">
      <style:text-properties fo:font-family="Computer Modern" fo:font-weight="bold" fo:font-size="8.4pt"/>
    </style:style>
    <style:style style:name="font:computer-modern:bold:0.8" style:family="text">
      <style:text-properties fo:font-family="Computer Modern" fo:font-weight="bold" fo:font-size="9.6pt"/>
    </style:style>
    <style:style style:name="font:computer-modern:bold:0.8:para" style:family="paragraph" style:parent-style-name="Text_20_body">
      <style:text-properties fo:font-family="Computer Modern" fo:font-weight="bold" fo:font-size="9.6pt"/>
    </style:style>
    <style:style style:name="font:computer-modern:bold:0.9" style:family="text">
      <style:text-properties fo:font-family="Computer Modern" fo:font-weight="bold" fo:font-size="10.8pt"/>
    </style:style>
    <style:style style:name="font:computer-modern:bold:0.9:para" style:family="paragraph" style:parent-style-name="Text_20_body">
      <style:text-properties fo:font-family="Computer Modern" fo:font-weight="bold" fo:font-size="10.8pt"/>
    </style:style>
    <style:style style:name="font:computer-modern:bold:1.0" style:family="text">
      <style:text-properties fo:font-family="Computer Modern" fo:font-weight="bold" fo:font-size="12.0pt"/>
    </style:style>
    <style:style style:name="font:computer-modern:bold:1.0:para" style:family="paragraph" style:parent-style-name="Text_20_body">
      <style:text-properties fo:font-family="Computer Modern" fo:font-weight="bold" fo:font-size="12.0pt"/>
    </style:style>
    <style:style style:name="font:computer-modern:bold:1.2" style:family="text">
      <style:text-properties fo:font-family="Computer Modern" fo:font-weight="bold" fo:font-size="14.4pt"/>
    </style:style>
    <style:style style:name="font:computer-modern:bold:1.2:para" style:family="paragraph" style:parent-style-name="Text_20_body">
      <style:text-properties fo:font-family="Computer Modern" fo:font-weight="bold" fo:font-size="14.4pt"/>
    </style:style>
    <style:style style:name="font:computer-modern:bold:1.44" style:family="text">
      <style:text-properties fo:font-family="Computer Modern" fo:font-weight="bold" fo:font-size="17.3pt"/>
    </style:style>
    <style:style style:name="font:computer-modern:bold:1.44:para" style:family="paragraph" style:parent-style-name="Text_20_body">
      <style:text-properties fo:font-family="Computer Modern" fo:font-weight="bold" fo:font-size="17.3pt"/>
    </style:style>
    <style:style style:name="font:computer-modern:bold:1.728" style:family="text">
      <style:text-properties fo:font-family="Computer Modern" fo:font-weight="bold" fo:font-size="20.7pt"/>
    </style:style>
    <style:style style:name="font:computer-modern:bold:1.728:para" style:family="paragraph" style:parent-style-name="Text_20_body">
      <style:text-properties fo:font-family="Computer Modern" fo:font-weight="bold" fo:font-size="20.7pt"/>
    </style:style>
    <style:style style:name="font:computer-modern:bold:2.074" style:family="text">
      <style:text-properties fo:font-family="Computer Modern" fo:font-weight="bold" fo:font-size="24.9pt"/>
    </style:style>
    <style:style style:name="font:computer-modern:bold:2.074:para" style:family="paragraph" style:parent-style-name="Text_20_body">
      <style:text-properties fo:font-family="Computer Modern" fo:font-weight="bold" fo:font-size="24.9pt"/>
    </style:style>
    <style:style style:name="font:computer-modern:bold:2.488" style:family="text">
      <style:text-properties fo:font-family="Computer Modern" fo:font-weight="bold" fo:font-size="29.9pt"/>
    </style:style>
    <style:style style:name="font:computer-modern:bold:2.488:para" style:family="paragraph" style:parent-style-name="Text_20_body">
      <style:text-properties fo:font-family="Computer Modern" fo:font-weight="bold" fo:font-size="29.9pt"/>
    </style:style>
    <style:style style:name="font:computer-modern:bold-italic:0.6" style:family="text">
      <style:text-properties fo:font-family="Computer Modern" fo:font-style="italic" fo:font-weight="bold" fo:font-size="7.2pt"/>
    </style:style>
    <style:style style:name="font:computer-modern:bold-italic:0.6:para" style:family="paragraph" style:parent-style-name="Text_20_body">
      <style:text-properties fo:font-family="Computer Modern" fo:font-style="italic" fo:font-weight="bold" fo:font-size="7.2pt"/>
    </style:style>
    <style:style style:name="font:computer-modern:bold-italic:0.7" style:family="text">
      <style:text-properties fo:font-family="Computer Modern" fo:font-style="italic" fo:font-weight="bold" fo:font-size="8.4pt"/>
    </style:style>
    <style:style style:name="font:computer-modern:bold-italic:0.7:para" style:family="paragraph" style:parent-style-name="Text_20_body">
      <style:text-properties fo:font-family="Computer Modern" fo:font-style="italic" fo:font-weight="bold" fo:font-size="8.4pt"/>
    </style:style>
    <style:style style:name="font:computer-modern:bold-italic:0.8" style:family="text">
      <style:text-properties fo:font-family="Computer Modern" fo:font-style="italic" fo:font-weight="bold" fo:font-size="9.6pt"/>
    </style:style>
    <style:style style:name="font:computer-modern:bold-italic:0.8:para" style:family="paragraph" style:parent-style-name="Text_20_body">
      <style:text-properties fo:font-family="Computer Modern" fo:font-style="italic" fo:font-weight="bold" fo:font-size="9.6pt"/>
    </style:style>
    <style:style style:name="font:computer-modern:bold-italic:0.9" style:family="text">
      <style:text-properties fo:font-family="Computer Modern" fo:font-style="italic" fo:font-weight="bold" fo:font-size="10.8pt"/>
    </style:style>
    <style:style style:name="font:computer-modern:bold-italic:0.9:para" style:family="paragraph" style:parent-style-name="Text_20_body">
      <style:text-properties fo:font-family="Computer Modern" fo:font-style="italic" fo:font-weight="bold" fo:font-size="10.8pt"/>
    </style:style>
    <style:style style:name="font:computer-modern:bold-italic:1.0" style:family="text">
      <style:text-properties fo:font-family="Computer Modern" fo:font-style="italic" fo:font-weight="bold" fo:font-size="12.0pt"/>
    </style:style>
    <style:style style:name="font:computer-modern:bold-italic:1.0:para" style:family="paragraph" style:parent-style-name="Text_20_body">
      <style:text-properties fo:font-family="Computer Modern" fo:font-style="italic" fo:font-weight="bold" fo:font-size="12.0pt"/>
    </style:style>
    <style:style style:name="font:computer-modern:bold-italic:1.2" style:family="text">
      <style:text-properties fo:font-family="Computer Modern" fo:font-style="italic" fo:font-weight="bold" fo:font-size="14.4pt"/>
    </style:style>
    <style:style style:name="font:computer-modern:bold-italic:1.2:para" style:family="paragraph" style:parent-style-name="Text_20_body">
      <style:text-properties fo:font-family="Computer Modern" fo:font-style="italic" fo:font-weight="bold" fo:font-size="14.4pt"/>
    </style:style>
    <style:style style:name="font:computer-modern:bold-italic:1.44" style:family="text">
      <style:text-properties fo:font-family="Computer Modern" fo:font-style="italic" fo:font-weight="bold" fo:font-size="17.3pt"/>
    </style:style>
    <style:style style:name="font:computer-modern:bold-italic:1.44:para" style:family="paragraph" style:parent-style-name="Text_20_body">
      <style:text-properties fo:font-family="Computer Modern" fo:font-style="italic" fo:font-weight="bold" fo:font-size="17.3pt"/>
    </style:style>
    <style:style style:name="font:computer-modern:bold-italic:1.728" style:family="text">
      <style:text-properties fo:font-family="Computer Modern" fo:font-style="italic" fo:font-weight="bold" fo:font-size="20.7pt"/>
    </style:style>
    <style:style style:name="font:computer-modern:bold-italic:1.728:para" style:family="paragraph" style:parent-style-name="Text_20_body">
      <style:text-properties fo:font-family="Computer Modern" fo:font-style="italic" fo:font-weight="bold" fo:font-size="20.7pt"/>
    </style:style>
    <style:style style:name="font:computer-modern:bold-italic:2.074" style:family="text">
      <style:text-properties fo:font-family="Computer Modern" fo:font-style="italic" fo:font-weight="bold" fo:font-size="24.9pt"/>
    </style:style>
    <style:style style:name="font:computer-modern:bold-italic:2.074:para" style:family="paragraph" style:parent-style-name="Text_20_body">
      <style:text-properties fo:font-family="Computer Modern" fo:font-style="italic" fo:font-weight="bold" fo:font-size="24.9pt"/>
    </style:style>
    <style:style style:name="font:computer-modern:bold-italic:2.488" style:family="text">
      <style:text-properties fo:font-family="Computer Modern" fo:font-style="italic" fo:font-weight="bold" fo:font-size="29.9pt"/>
    </style:style>
    <style:style style:name="font:computer-modern:bold-italic:2.488:para" style:family="paragraph" style:parent-style-name="Text_20_body">
      <style:text-properties fo:font-family="Computer Modern" fo:font-style="italic" fo:font-weight="bold" fo:font-size="29.9pt"/>
    </style:style>
    <style:style style:name="font:courier-new:italic:0.6" style:family="text">
      <style:text-properties fo:font-family="Courier New" fo:font-style="italic" fo:font-size="7.2pt"/>
    </style:style>
    <style:style style:name="font:courier-new:italic:0.6:para" style:family="paragraph" style:parent-style-name="Text_20_body">
      <style:text-properties fo:font-family="Courier New" fo:font-style="italic" fo:font-size="7.2pt"/>
    </style:style>
    <style:style style:name="font:courier-new:italic:0.7" style:family="text">
      <style:text-properties fo:font-family="Courier New" fo:font-style="italic" fo:font-size="8.4pt"/>
    </style:style>
    <style:style style:name="font:courier-new:italic:0.7:para" style:family="paragraph" style:parent-style-name="Text_20_body">
      <style:text-properties fo:font-family="Courier New" fo:font-style="italic" fo:font-size="8.4pt"/>
    </style:style>
    <style:style style:name="font:courier-new:italic:0.8" style:family="text">
      <style:text-properties fo:font-family="Courier New" fo:font-style="italic" fo:font-size="9.6pt"/>
    </style:style>
    <style:style style:name="font:courier-new:italic:0.8:para" style:family="paragraph" style:parent-style-name="Text_20_body">
      <style:text-properties fo:font-family="Courier New" fo:font-style="italic" fo:font-size="9.6pt"/>
    </style:style>
    <style:style style:name="font:courier-new:italic:0.9" style:family="text">
      <style:text-properties fo:font-family="Courier New" fo:font-style="italic" fo:font-size="10.8pt"/>
    </style:style>
    <style:style style:name="font:courier-new:italic:0.9:para" style:family="paragraph" style:parent-style-name="Text_20_body">
      <style:text-properties fo:font-family="Courier New" fo:font-style="italic" fo:font-size="10.8pt"/>
    </style:style>
    <style:style style:name="font:courier-new:italic:1.0" style:family="text">
      <style:text-properties fo:font-family="Courier New" fo:font-style="italic" fo:font-size="12.0pt"/>
    </style:style>
    <style:style style:name="font:courier-new:italic:1.0:para" style:family="paragraph" style:parent-style-name="Text_20_body">
      <style:text-properties fo:font-family="Courier New" fo:font-style="italic" fo:font-size="12.0pt"/>
    </style:style>
    <style:style style:name="font:courier-new:italic:1.2" style:family="text">
      <style:text-properties fo:font-family="Courier New" fo:font-style="italic" fo:font-size="14.4pt"/>
    </style:style>
    <style:style style:name="font:courier-new:italic:1.2:para" style:family="paragraph" style:parent-style-name="Text_20_body">
      <style:text-properties fo:font-family="Courier New" fo:font-style="italic" fo:font-size="14.4pt"/>
    </style:style>
    <style:style style:name="font:courier-new:italic:1.44" style:family="text">
      <style:text-properties fo:font-family="Courier New" fo:font-style="italic" fo:font-size="17.3pt"/>
    </style:style>
    <style:style style:name="font:courier-new:italic:1.44:para" style:family="paragraph" style:parent-style-name="Text_20_body">
      <style:text-properties fo:font-family="Courier New" fo:font-style="italic" fo:font-size="17.3pt"/>
    </style:style>
    <style:style style:name="font:courier-new:italic:1.728" style:family="text">
      <style:text-properties fo:font-family="Courier New" fo:font-style="italic" fo:font-size="20.7pt"/>
    </style:style>
    <style:style style:name="font:courier-new:italic:1.728:para" style:family="paragraph" style:parent-style-name="Text_20_body">
      <style:text-properties fo:font-family="Courier New" fo:font-style="italic" fo:font-size="20.7pt"/>
    </style:style>
    <style:style style:name="font:courier-new:italic:2.074" style:family="text">
      <style:text-properties fo:font-family="Courier New" fo:font-style="italic" fo:font-size="24.9pt"/>
    </style:style>
    <style:style style:name="font:courier-new:italic:2.074:para" style:family="paragraph" style:parent-style-name="Text_20_body">
      <style:text-properties fo:font-family="Courier New" fo:font-style="italic" fo:font-size="24.9pt"/>
    </style:style>
    <style:style style:name="font:courier-new:italic:2.488" style:family="text">
      <style:text-properties fo:font-family="Courier New" fo:font-style="italic" fo:font-size="29.9pt"/>
    </style:style>
    <style:style style:name="font:courier-new:italic:2.488:para" style:family="paragraph" style:parent-style-name="Text_20_body">
      <style:text-properties fo:font-family="Courier New" fo:font-style="italic" fo:font-size="29.9pt"/>
    </style:style>
    <style:style style:name="font:courier-new:bold:0.6" style:family="text">
      <style:text-properties fo:font-family="Courier New" fo:font-weight="bold" fo:font-size="7.2pt"/>
    </style:style>
    <style:style style:name="font:courier-new:bold:0.6:para" style:family="paragraph" style:parent-style-name="Text_20_body">
      <style:text-properties fo:font-family="Courier New" fo:font-weight="bold" fo:font-size="7.2pt"/>
    </style:style>
    <style:style style:name="font:courier-new:bold:0.7" style:family="text">
      <style:text-properties fo:font-family="Courier New" fo:font-weight="bold" fo:font-size="8.4pt"/>
    </style:style>
    <style:style style:name="font:courier-new:bold:0.7:para" style:family="paragraph" style:parent-style-name="Text_20_body">
      <style:text-properties fo:font-family="Courier New" fo:font-weight="bold" fo:font-size="8.4pt"/>
    </style:style>
    <style:style style:name="font:courier-new:bold:0.8" style:family="text">
      <style:text-properties fo:font-family="Courier New" fo:font-weight="bold" fo:font-size="9.6pt"/>
    </style:style>
    <style:style style:name="font:courier-new:bold:0.8:para" style:family="paragraph" style:parent-style-name="Text_20_body">
      <style:text-properties fo:font-family="Courier New" fo:font-weight="bold" fo:font-size="9.6pt"/>
    </style:style>
    <style:style style:name="font:courier-new:bold:0.9" style:family="text">
      <style:text-properties fo:font-family="Courier New" fo:font-weight="bold" fo:font-size="10.8pt"/>
    </style:style>
    <style:style style:name="font:courier-new:bold:0.9:para" style:family="paragraph" style:parent-style-name="Text_20_body">
      <style:text-properties fo:font-family="Courier New" fo:font-weight="bold" fo:font-size="10.8pt"/>
    </style:style>
    <style:style style:name="font:courier-new:bold:1.0" style:family="text">
      <style:text-properties fo:font-family="Courier New" fo:font-weight="bold" fo:font-size="12.0pt"/>
    </style:style>
    <style:style style:name="font:courier-new:bold:1.0:para" style:family="paragraph" style:parent-style-name="Text_20_body">
      <style:text-properties fo:font-family="Courier New" fo:font-weight="bold" fo:font-size="12.0pt"/>
    </style:style>
    <style:style style:name="font:courier-new:bold:1.2" style:family="text">
      <style:text-properties fo:font-family="Courier New" fo:font-weight="bold" fo:font-size="14.4pt"/>
    </style:style>
    <style:style style:name="font:courier-new:bold:1.2:para" style:family="paragraph" style:parent-style-name="Text_20_body">
      <style:text-properties fo:font-family="Courier New" fo:font-weight="bold" fo:font-size="14.4pt"/>
    </style:style>
    <style:style style:name="font:courier-new:bold:1.44" style:family="text">
      <style:text-properties fo:font-family="Courier New" fo:font-weight="bold" fo:font-size="17.3pt"/>
    </style:style>
    <style:style style:name="font:courier-new:bold:1.44:para" style:family="paragraph" style:parent-style-name="Text_20_body">
      <style:text-properties fo:font-family="Courier New" fo:font-weight="bold" fo:font-size="17.3pt"/>
    </style:style>
    <style:style style:name="font:courier-new:bold:1.728" style:family="text">
      <style:text-properties fo:font-family="Courier New" fo:font-weight="bold" fo:font-size="20.7pt"/>
    </style:style>
    <style:style style:name="font:courier-new:bold:1.728:para" style:family="paragraph" style:parent-style-name="Text_20_body">
      <style:text-properties fo:font-family="Courier New" fo:font-weight="bold" fo:font-size="20.7pt"/>
    </style:style>
    <style:style style:name="font:courier-new:bold:2.074" style:family="text">
      <style:text-properties fo:font-family="Courier New" fo:font-weight="bold" fo:font-size="24.9pt"/>
    </style:style>
    <style:style style:name="font:courier-new:bold:2.074:para" style:family="paragraph" style:parent-style-name="Text_20_body">
      <style:text-properties fo:font-family="Courier New" fo:font-weight="bold" fo:font-size="24.9pt"/>
    </style:style>
    <style:style style:name="font:courier-new:bold:2.488" style:family="text">
      <style:text-properties fo:font-family="Courier New" fo:font-weight="bold" fo:font-size="29.9pt"/>
    </style:style>
    <style:style style:name="font:courier-new:bold:2.488:para" style:family="paragraph" style:parent-style-name="Text_20_body">
      <style:text-properties fo:font-family="Courier New" fo:font-weight="bold" fo:font-size="29.9pt"/>
    </style:style>
    <style:style style:name="font:courier-new:bold-italic:0.6" style:family="text">
      <style:text-properties fo:font-family="Courier New" fo:font-style="italic" fo:font-weight="bold" fo:font-size="7.2pt"/>
    </style:style>
    <style:style style:name="font:courier-new:bold-italic:0.6:para" style:family="paragraph" style:parent-style-name="Text_20_body">
      <style:text-properties fo:font-family="Courier New" fo:font-style="italic" fo:font-weight="bold" fo:font-size="7.2pt"/>
    </style:style>
    <style:style style:name="font:courier-new:bold-italic:0.7" style:family="text">
      <style:text-properties fo:font-family="Courier New" fo:font-style="italic" fo:font-weight="bold" fo:font-size="8.4pt"/>
    </style:style>
    <style:style style:name="font:courier-new:bold-italic:0.7:para" style:family="paragraph" style:parent-style-name="Text_20_body">
      <style:text-properties fo:font-family="Courier New" fo:font-style="italic" fo:font-weight="bold" fo:font-size="8.4pt"/>
    </style:style>
    <style:style style:name="font:courier-new:bold-italic:0.8" style:family="text">
      <style:text-properties fo:font-family="Courier New" fo:font-style="italic" fo:font-weight="bold" fo:font-size="9.6pt"/>
    </style:style>
    <style:style style:name="font:courier-new:bold-italic:0.8:para" style:family="paragraph" style:parent-style-name="Text_20_body">
      <style:text-properties fo:font-family="Courier New" fo:font-style="italic" fo:font-weight="bold" fo:font-size="9.6pt"/>
    </style:style>
    <style:style style:name="font:courier-new:bold-italic:0.9" style:family="text">
      <style:text-properties fo:font-family="Courier New" fo:font-style="italic" fo:font-weight="bold" fo:font-size="10.8pt"/>
    </style:style>
    <style:style style:name="font:courier-new:bold-italic:0.9:para" style:family="paragraph" style:parent-style-name="Text_20_body">
      <style:text-properties fo:font-family="Courier New" fo:font-style="italic" fo:font-weight="bold" fo:font-size="10.8pt"/>
    </style:style>
    <style:style style:name="font:courier-new:bold-italic:1.0" style:family="text">
      <style:text-properties fo:font-family="Courier New" fo:font-style="italic" fo:font-weight="bold" fo:font-size="12.0pt"/>
    </style:style>
    <style:style style:name="font:courier-new:bold-italic:1.0:para" style:family="paragraph" style:parent-style-name="Text_20_body">
      <style:text-properties fo:font-family="Courier New" fo:font-style="italic" fo:font-weight="bold" fo:font-size="12.0pt"/>
    </style:style>
    <style:style style:name="font:courier-new:bold-italic:1.2" style:family="text">
      <style:text-properties fo:font-family="Courier New" fo:font-style="italic" fo:font-weight="bold" fo:font-size="14.4pt"/>
    </style:style>
    <style:style style:name="font:courier-new:bold-italic:1.2:para" style:family="paragraph" style:parent-style-name="Text_20_body">
      <style:text-properties fo:font-family="Courier New" fo:font-style="italic" fo:font-weight="bold" fo:font-size="14.4pt"/>
    </style:style>
    <style:style style:name="font:courier-new:bold-italic:1.44" style:family="text">
      <style:text-properties fo:font-family="Courier New" fo:font-style="italic" fo:font-weight="bold" fo:font-size="17.3pt"/>
    </style:style>
    <style:style style:name="font:courier-new:bold-italic:1.44:para" style:family="paragraph" style:parent-style-name="Text_20_body">
      <style:text-properties fo:font-family="Courier New" fo:font-style="italic" fo:font-weight="bold" fo:font-size="17.3pt"/>
    </style:style>
    <style:style style:name="font:courier-new:bold-italic:1.728" style:family="text">
      <style:text-properties fo:font-family="Courier New" fo:font-style="italic" fo:font-weight="bold" fo:font-size="20.7pt"/>
    </style:style>
    <style:style style:name="font:courier-new:bold-italic:1.728:para" style:family="paragraph" style:parent-style-name="Text_20_body">
      <style:text-properties fo:font-family="Courier New" fo:font-style="italic" fo:font-weight="bold" fo:font-size="20.7pt"/>
    </style:style>
    <style:style style:name="font:courier-new:bold-italic:2.074" style:family="text">
      <style:text-properties fo:font-family="Courier New" fo:font-style="italic" fo:font-weight="bold" fo:font-size="24.9pt"/>
    </style:style>
    <style:style style:name="font:courier-new:bold-italic:2.074:para" style:family="paragraph" style:parent-style-name="Text_20_body">
      <style:text-properties fo:font-family="Courier New" fo:font-style="italic" fo:font-weight="bold" fo:font-size="24.9pt"/>
    </style:style>
    <style:style style:name="font:courier-new:bold-italic:2.488" style:family="text">
      <style:text-properties fo:font-family="Courier New" fo:font-style="italic" fo:font-weight="bold" fo:font-size="29.9pt"/>
    </style:style>
    <style:style style:name="font:courier-new:bold-italic:2.488:para" style:family="paragraph" style:parent-style-name="Text_20_body">
      <style:text-properties fo:font-family="Courier New" fo:font-style="italic" fo:font-weight="bold" fo:font-size="29.9pt"/>
    </style:style>
    <style:style style:name="font:garamond:italic:0.6" style:family="text">
      <style:text-properties fo:font-family="Garamond" fo:font-style="italic" fo:font-size="7.2pt"/>
    </style:style>
    <style:style style:name="font:garamond:italic:0.6:para" style:family="paragraph" style:parent-style-name="Text_20_body">
      <style:text-properties fo:font-family="Garamond" fo:font-style="italic" fo:font-size="7.2pt"/>
    </style:style>
    <style:style style:name="font:garamond:italic:0.7" style:family="text">
      <style:text-properties fo:font-family="Garamond" fo:font-style="italic" fo:font-size="8.4pt"/>
    </style:style>
    <style:style style:name="font:garamond:italic:0.7:para" style:family="paragraph" style:parent-style-name="Text_20_body">
      <style:text-properties fo:font-family="Garamond" fo:font-style="italic" fo:font-size="8.4pt"/>
    </style:style>
    <style:style style:name="font:garamond:italic:0.8" style:family="text">
      <style:text-properties fo:font-family="Garamond" fo:font-style="italic" fo:font-size="9.6pt"/>
    </style:style>
    <style:style style:name="font:garamond:italic:0.8:para" style:family="paragraph" style:parent-style-name="Text_20_body">
      <style:text-properties fo:font-family="Garamond" fo:font-style="italic" fo:font-size="9.6pt"/>
    </style:style>
    <style:style style:name="font:garamond:italic:0.9" style:family="text">
      <style:text-properties fo:font-family="Garamond" fo:font-style="italic" fo:font-size="10.8pt"/>
    </style:style>
    <style:style style:name="font:garamond:italic:0.9:para" style:family="paragraph" style:parent-style-name="Text_20_body">
      <style:text-properties fo:font-family="Garamond" fo:font-style="italic" fo:font-size="10.8pt"/>
    </style:style>
    <style:style style:name="font:garamond:italic:1.0" style:family="text">
      <style:text-properties fo:font-family="Garamond" fo:font-style="italic" fo:font-size="12.0pt"/>
    </style:style>
    <style:style style:name="font:garamond:italic:1.0:para" style:family="paragraph" style:parent-style-name="Text_20_body">
      <style:text-properties fo:font-family="Garamond" fo:font-style="italic" fo:font-size="12.0pt"/>
    </style:style>
    <style:style style:name="font:garamond:italic:1.2" style:family="text">
      <style:text-properties fo:font-family="Garamond" fo:font-style="italic" fo:font-size="14.4pt"/>
    </style:style>
    <style:style style:name="font:garamond:italic:1.2:para" style:family="paragraph" style:parent-style-name="Text_20_body">
      <style:text-properties fo:font-family="Garamond" fo:font-style="italic" fo:font-size="14.4pt"/>
    </style:style>
    <style:style style:name="font:garamond:italic:1.44" style:family="text">
      <style:text-properties fo:font-family="Garamond" fo:font-style="italic" fo:font-size="17.3pt"/>
    </style:style>
    <style:style style:name="font:garamond:italic:1.44:para" style:family="paragraph" style:parent-style-name="Text_20_body">
      <style:text-properties fo:font-family="Garamond" fo:font-style="italic" fo:font-size="17.3pt"/>
    </style:style>
    <style:style style:name="font:garamond:italic:1.728" style:family="text">
      <style:text-properties fo:font-family="Garamond" fo:font-style="italic" fo:font-size="20.7pt"/>
    </style:style>
    <style:style style:name="font:garamond:italic:1.728:para" style:family="paragraph" style:parent-style-name="Text_20_body">
      <style:text-properties fo:font-family="Garamond" fo:font-style="italic" fo:font-size="20.7pt"/>
    </style:style>
    <style:style style:name="font:garamond:italic:2.074" style:family="text">
      <style:text-properties fo:font-family="Garamond" fo:font-style="italic" fo:font-size="24.9pt"/>
    </style:style>
    <style:style style:name="font:garamond:italic:2.074:para" style:family="paragraph" style:parent-style-name="Text_20_body">
      <style:text-properties fo:font-family="Garamond" fo:font-style="italic" fo:font-size="24.9pt"/>
    </style:style>
    <style:style style:name="font:garamond:italic:2.488" style:family="text">
      <style:text-properties fo:font-family="Garamond" fo:font-style="italic" fo:font-size="29.9pt"/>
    </style:style>
    <style:style style:name="font:garamond:italic:2.488:para" style:family="paragraph" style:parent-style-name="Text_20_body">
      <style:text-properties fo:font-family="Garamond" fo:font-style="italic" fo:font-size="29.9pt"/>
    </style:style>
    <style:style style:name="font:garamond:bold:0.6" style:family="text">
      <style:text-properties fo:font-family="Garamond" fo:font-weight="bold" fo:font-size="7.2pt"/>
    </style:style>
    <style:style style:name="font:garamond:bold:0.6:para" style:family="paragraph" style:parent-style-name="Text_20_body">
      <style:text-properties fo:font-family="Garamond" fo:font-weight="bold" fo:font-size="7.2pt"/>
    </style:style>
    <style:style style:name="font:garamond:bold:0.7" style:family="text">
      <style:text-properties fo:font-family="Garamond" fo:font-weight="bold" fo:font-size="8.4pt"/>
    </style:style>
    <style:style style:name="font:garamond:bold:0.7:para" style:family="paragraph" style:parent-style-name="Text_20_body">
      <style:text-properties fo:font-family="Garamond" fo:font-weight="bold" fo:font-size="8.4pt"/>
    </style:style>
    <style:style style:name="font:garamond:bold:0.8" style:family="text">
      <style:text-properties fo:font-family="Garamond" fo:font-weight="bold" fo:font-size="9.6pt"/>
    </style:style>
    <style:style style:name="font:garamond:bold:0.8:para" style:family="paragraph" style:parent-style-name="Text_20_body">
      <style:text-properties fo:font-family="Garamond" fo:font-weight="bold" fo:font-size="9.6pt"/>
    </style:style>
    <style:style style:name="font:garamond:bold:0.9" style:family="text">
      <style:text-properties fo:font-family="Garamond" fo:font-weight="bold" fo:font-size="10.8pt"/>
    </style:style>
    <style:style style:name="font:garamond:bold:0.9:para" style:family="paragraph" style:parent-style-name="Text_20_body">
      <style:text-properties fo:font-family="Garamond" fo:font-weight="bold" fo:font-size="10.8pt"/>
    </style:style>
    <style:style style:name="font:garamond:bold:1.0" style:family="text">
      <style:text-properties fo:font-family="Garamond" fo:font-weight="bold" fo:font-size="12.0pt"/>
    </style:style>
    <style:style style:name="font:garamond:bold:1.0:para" style:family="paragraph" style:parent-style-name="Text_20_body">
      <style:text-properties fo:font-family="Garamond" fo:font-weight="bold" fo:font-size="12.0pt"/>
    </style:style>
    <style:style style:name="font:garamond:bold:1.2" style:family="text">
      <style:text-properties fo:font-family="Garamond" fo:font-weight="bold" fo:font-size="14.4pt"/>
    </style:style>
    <style:style style:name="font:garamond:bold:1.2:para" style:family="paragraph" style:parent-style-name="Text_20_body">
      <style:text-properties fo:font-family="Garamond" fo:font-weight="bold" fo:font-size="14.4pt"/>
    </style:style>
    <style:style style:name="font:garamond:bold:1.44" style:family="text">
      <style:text-properties fo:font-family="Garamond" fo:font-weight="bold" fo:font-size="17.3pt"/>
    </style:style>
    <style:style style:name="font:garamond:bold:1.44:para" style:family="paragraph" style:parent-style-name="Text_20_body">
      <style:text-properties fo:font-family="Garamond" fo:font-weight="bold" fo:font-size="17.3pt"/>
    </style:style>
    <style:style style:name="font:garamond:bold:1.728" style:family="text">
      <style:text-properties fo:font-family="Garamond" fo:font-weight="bold" fo:font-size="20.7pt"/>
    </style:style>
    <style:style style:name="font:garamond:bold:1.728:para" style:family="paragraph" style:parent-style-name="Text_20_body">
      <style:text-properties fo:font-family="Garamond" fo:font-weight="bold" fo:font-size="20.7pt"/>
    </style:style>
    <style:style style:name="font:garamond:bold:2.074" style:family="text">
      <style:text-properties fo:font-family="Garamond" fo:font-weight="bold" fo:font-size="24.9pt"/>
    </style:style>
    <style:style style:name="font:garamond:bold:2.074:para" style:family="paragraph" style:parent-style-name="Text_20_body">
      <style:text-properties fo:font-family="Garamond" fo:font-weight="bold" fo:font-size="24.9pt"/>
    </style:style>
    <style:style style:name="font:garamond:bold:2.488" style:family="text">
      <style:text-properties fo:font-family="Garamond" fo:font-weight="bold" fo:font-size="29.9pt"/>
    </style:style>
    <style:style style:name="font:garamond:bold:2.488:para" style:family="paragraph" style:parent-style-name="Text_20_body">
      <style:text-properties fo:font-family="Garamond" fo:font-weight="bold" fo:font-size="29.9pt"/>
    </style:style>
    <style:style style:name="font:garamond:bold-italic:0.6" style:family="text">
      <style:text-properties fo:font-family="Garamond" fo:font-style="italic" fo:font-weight="bold" fo:font-size="7.2pt"/>
    </style:style>
    <style:style style:name="font:garamond:bold-italic:0.6:para" style:family="paragraph" style:parent-style-name="Text_20_body">
      <style:text-properties fo:font-family="Garamond" fo:font-style="italic" fo:font-weight="bold" fo:font-size="7.2pt"/>
    </style:style>
    <style:style style:name="font:garamond:bold-italic:0.7" style:family="text">
      <style:text-properties fo:font-family="Garamond" fo:font-style="italic" fo:font-weight="bold" fo:font-size="8.4pt"/>
    </style:style>
    <style:style style:name="font:garamond:bold-italic:0.7:para" style:family="paragraph" style:parent-style-name="Text_20_body">
      <style:text-properties fo:font-family="Garamond" fo:font-style="italic" fo:font-weight="bold" fo:font-size="8.4pt"/>
    </style:style>
    <style:style style:name="font:garamond:bold-italic:0.8" style:family="text">
      <style:text-properties fo:font-family="Garamond" fo:font-style="italic" fo:font-weight="bold" fo:font-size="9.6pt"/>
    </style:style>
    <style:style style:name="font:garamond:bold-italic:0.8:para" style:family="paragraph" style:parent-style-name="Text_20_body">
      <style:text-properties fo:font-family="Garamond" fo:font-style="italic" fo:font-weight="bold" fo:font-size="9.6pt"/>
    </style:style>
    <style:style style:name="font:garamond:bold-italic:0.9" style:family="text">
      <style:text-properties fo:font-family="Garamond" fo:font-style="italic" fo:font-weight="bold" fo:font-size="10.8pt"/>
    </style:style>
    <style:style style:name="font:garamond:bold-italic:0.9:para" style:family="paragraph" style:parent-style-name="Text_20_body">
      <style:text-properties fo:font-family="Garamond" fo:font-style="italic" fo:font-weight="bold" fo:font-size="10.8pt"/>
    </style:style>
    <style:style style:name="font:garamond:bold-italic:1.0" style:family="text">
      <style:text-properties fo:font-family="Garamond" fo:font-style="italic" fo:font-weight="bold" fo:font-size="12.0pt"/>
    </style:style>
    <style:style style:name="font:garamond:bold-italic:1.0:para" style:family="paragraph" style:parent-style-name="Text_20_body">
      <style:text-properties fo:font-family="Garamond" fo:font-style="italic" fo:font-weight="bold" fo:font-size="12.0pt"/>
    </style:style>
    <style:style style:name="font:garamond:bold-italic:1.2" style:family="text">
      <style:text-properties fo:font-family="Garamond" fo:font-style="italic" fo:font-weight="bold" fo:font-size="14.4pt"/>
    </style:style>
    <style:style style:name="font:garamond:bold-italic:1.2:para" style:family="paragraph" style:parent-style-name="Text_20_body">
      <style:text-properties fo:font-family="Garamond" fo:font-style="italic" fo:font-weight="bold" fo:font-size="14.4pt"/>
    </style:style>
    <style:style style:name="font:garamond:bold-italic:1.44" style:family="text">
      <style:text-properties fo:font-family="Garamond" fo:font-style="italic" fo:font-weight="bold" fo:font-size="17.3pt"/>
    </style:style>
    <style:style style:name="font:garamond:bold-italic:1.44:para" style:family="paragraph" style:parent-style-name="Text_20_body">
      <style:text-properties fo:font-family="Garamond" fo:font-style="italic" fo:font-weight="bold" fo:font-size="17.3pt"/>
    </style:style>
    <style:style style:name="font:garamond:bold-italic:1.728" style:family="text">
      <style:text-properties fo:font-family="Garamond" fo:font-style="italic" fo:font-weight="bold" fo:font-size="20.7pt"/>
    </style:style>
    <style:style style:name="font:garamond:bold-italic:1.728:para" style:family="paragraph" style:parent-style-name="Text_20_body">
      <style:text-properties fo:font-family="Garamond" fo:font-style="italic" fo:font-weight="bold" fo:font-size="20.7pt"/>
    </style:style>
    <style:style style:name="font:garamond:bold-italic:2.074" style:family="text">
      <style:text-properties fo:font-family="Garamond" fo:font-style="italic" fo:font-weight="bold" fo:font-size="24.9pt"/>
    </style:style>
    <style:style style:name="font:garamond:bold-italic:2.074:para" style:family="paragraph" style:parent-style-name="Text_20_body">
      <style:text-properties fo:font-family="Garamond" fo:font-style="italic" fo:font-weight="bold" fo:font-size="24.9pt"/>
    </style:style>
    <style:style style:name="font:garamond:bold-italic:2.488" style:family="text">
      <style:text-properties fo:font-family="Garamond" fo:font-style="italic" fo:font-weight="bold" fo:font-size="29.9pt"/>
    </style:style>
    <style:style style:name="font:garamond:bold-italic:2.488:para" style:family="paragraph" style:parent-style-name="Text_20_body">
      <style:text-properties fo:font-family="Garamond" fo:font-style="italic" fo:font-weight="bold" fo:font-size="29.9pt"/>
    </style:style>
    <style:style style:name="font:georgia:italic:0.6" style:family="text">
      <style:text-properties fo:font-family="Georgia" fo:font-style="italic" fo:font-size="7.2pt"/>
    </style:style>
    <style:style style:name="font:georgia:italic:0.6:para" style:family="paragraph" style:parent-style-name="Text_20_body">
      <style:text-properties fo:font-family="Georgia" fo:font-style="italic" fo:font-size="7.2pt"/>
    </style:style>
    <style:style style:name="font:georgia:italic:0.7" style:family="text">
      <style:text-properties fo:font-family="Georgia" fo:font-style="italic" fo:font-size="8.4pt"/>
    </style:style>
    <style:style style:name="font:georgia:italic:0.7:para" style:family="paragraph" style:parent-style-name="Text_20_body">
      <style:text-properties fo:font-family="Georgia" fo:font-style="italic" fo:font-size="8.4pt"/>
    </style:style>
    <style:style style:name="font:georgia:italic:0.8" style:family="text">
      <style:text-properties fo:font-family="Georgia" fo:font-style="italic" fo:font-size="9.6pt"/>
    </style:style>
    <style:style style:name="font:georgia:italic:0.8:para" style:family="paragraph" style:parent-style-name="Text_20_body">
      <style:text-properties fo:font-family="Georgia" fo:font-style="italic" fo:font-size="9.6pt"/>
    </style:style>
    <style:style style:name="font:georgia:italic:0.9" style:family="text">
      <style:text-properties fo:font-family="Georgia" fo:font-style="italic" fo:font-size="10.8pt"/>
    </style:style>
    <style:style style:name="font:georgia:italic:0.9:para" style:family="paragraph" style:parent-style-name="Text_20_body">
      <style:text-properties fo:font-family="Georgia" fo:font-style="italic" fo:font-size="10.8pt"/>
    </style:style>
    <style:style style:name="font:georgia:italic:1.0" style:family="text">
      <style:text-properties fo:font-family="Georgia" fo:font-style="italic" fo:font-size="12.0pt"/>
    </style:style>
    <style:style style:name="font:georgia:italic:1.0:para" style:family="paragraph" style:parent-style-name="Text_20_body">
      <style:text-properties fo:font-family="Georgia" fo:font-style="italic" fo:font-size="12.0pt"/>
    </style:style>
    <style:style style:name="font:georgia:italic:1.2" style:family="text">
      <style:text-properties fo:font-family="Georgia" fo:font-style="italic" fo:font-size="14.4pt"/>
    </style:style>
    <style:style style:name="font:georgia:italic:1.2:para" style:family="paragraph" style:parent-style-name="Text_20_body">
      <style:text-properties fo:font-family="Georgia" fo:font-style="italic" fo:font-size="14.4pt"/>
    </style:style>
    <style:style style:name="font:georgia:italic:1.44" style:family="text">
      <style:text-properties fo:font-family="Georgia" fo:font-style="italic" fo:font-size="17.3pt"/>
    </style:style>
    <style:style style:name="font:georgia:italic:1.44:para" style:family="paragraph" style:parent-style-name="Text_20_body">
      <style:text-properties fo:font-family="Georgia" fo:font-style="italic" fo:font-size="17.3pt"/>
    </style:style>
    <style:style style:name="font:georgia:italic:1.728" style:family="text">
      <style:text-properties fo:font-family="Georgia" fo:font-style="italic" fo:font-size="20.7pt"/>
    </style:style>
    <style:style style:name="font:georgia:italic:1.728:para" style:family="paragraph" style:parent-style-name="Text_20_body">
      <style:text-properties fo:font-family="Georgia" fo:font-style="italic" fo:font-size="20.7pt"/>
    </style:style>
    <style:style style:name="font:georgia:italic:2.074" style:family="text">
      <style:text-properties fo:font-family="Georgia" fo:font-style="italic" fo:font-size="24.9pt"/>
    </style:style>
    <style:style style:name="font:georgia:italic:2.074:para" style:family="paragraph" style:parent-style-name="Text_20_body">
      <style:text-properties fo:font-family="Georgia" fo:font-style="italic" fo:font-size="24.9pt"/>
    </style:style>
    <style:style style:name="font:georgia:italic:2.488" style:family="text">
      <style:text-properties fo:font-family="Georgia" fo:font-style="italic" fo:font-size="29.9pt"/>
    </style:style>
    <style:style style:name="font:georgia:italic:2.488:para" style:family="paragraph" style:parent-style-name="Text_20_body">
      <style:text-properties fo:font-family="Georgia" fo:font-style="italic" fo:font-size="29.9pt"/>
    </style:style>
    <style:style style:name="font:georgia:bold:0.6" style:family="text">
      <style:text-properties fo:font-family="Georgia" fo:font-weight="bold" fo:font-size="7.2pt"/>
    </style:style>
    <style:style style:name="font:georgia:bold:0.6:para" style:family="paragraph" style:parent-style-name="Text_20_body">
      <style:text-properties fo:font-family="Georgia" fo:font-weight="bold" fo:font-size="7.2pt"/>
    </style:style>
    <style:style style:name="font:georgia:bold:0.7" style:family="text">
      <style:text-properties fo:font-family="Georgia" fo:font-weight="bold" fo:font-size="8.4pt"/>
    </style:style>
    <style:style style:name="font:georgia:bold:0.7:para" style:family="paragraph" style:parent-style-name="Text_20_body">
      <style:text-properties fo:font-family="Georgia" fo:font-weight="bold" fo:font-size="8.4pt"/>
    </style:style>
    <style:style style:name="font:georgia:bold:0.8" style:family="text">
      <style:text-properties fo:font-family="Georgia" fo:font-weight="bold" fo:font-size="9.6pt"/>
    </style:style>
    <style:style style:name="font:georgia:bold:0.8:para" style:family="paragraph" style:parent-style-name="Text_20_body">
      <style:text-properties fo:font-family="Georgia" fo:font-weight="bold" fo:font-size="9.6pt"/>
    </style:style>
    <style:style style:name="font:georgia:bold:0.9" style:family="text">
      <style:text-properties fo:font-family="Georgia" fo:font-weight="bold" fo:font-size="10.8pt"/>
    </style:style>
    <style:style style:name="font:georgia:bold:0.9:para" style:family="paragraph" style:parent-style-name="Text_20_body">
      <style:text-properties fo:font-family="Georgia" fo:font-weight="bold" fo:font-size="10.8pt"/>
    </style:style>
    <style:style style:name="font:georgia:bold:1.0" style:family="text">
      <style:text-properties fo:font-family="Georgia" fo:font-weight="bold" fo:font-size="12.0pt"/>
    </style:style>
    <style:style style:name="font:georgia:bold:1.0:para" style:family="paragraph" style:parent-style-name="Text_20_body">
      <style:text-properties fo:font-family="Georgia" fo:font-weight="bold" fo:font-size="12.0pt"/>
    </style:style>
    <style:style style:name="font:georgia:bold:1.2" style:family="text">
      <style:text-properties fo:font-family="Georgia" fo:font-weight="bold" fo:font-size="14.4pt"/>
    </style:style>
    <style:style style:name="font:georgia:bold:1.2:para" style:family="paragraph" style:parent-style-name="Text_20_body">
      <style:text-properties fo:font-family="Georgia" fo:font-weight="bold" fo:font-size="14.4pt"/>
    </style:style>
    <style:style style:name="font:georgia:bold:1.44" style:family="text">
      <style:text-properties fo:font-family="Georgia" fo:font-weight="bold" fo:font-size="17.3pt"/>
    </style:style>
    <style:style style:name="font:georgia:bold:1.44:para" style:family="paragraph" style:parent-style-name="Text_20_body">
      <style:text-properties fo:font-family="Georgia" fo:font-weight="bold" fo:font-size="17.3pt"/>
    </style:style>
    <style:style style:name="font:georgia:bold:1.728" style:family="text">
      <style:text-properties fo:font-family="Georgia" fo:font-weight="bold" fo:font-size="20.7pt"/>
    </style:style>
    <style:style style:name="font:georgia:bold:1.728:para" style:family="paragraph" style:parent-style-name="Text_20_body">
      <style:text-properties fo:font-family="Georgia" fo:font-weight="bold" fo:font-size="20.7pt"/>
    </style:style>
    <style:style style:name="font:georgia:bold:2.074" style:family="text">
      <style:text-properties fo:font-family="Georgia" fo:font-weight="bold" fo:font-size="24.9pt"/>
    </style:style>
    <style:style style:name="font:georgia:bold:2.074:para" style:family="paragraph" style:parent-style-name="Text_20_body">
      <style:text-properties fo:font-family="Georgia" fo:font-weight="bold" fo:font-size="24.9pt"/>
    </style:style>
    <style:style style:name="font:georgia:bold:2.488" style:family="text">
      <style:text-properties fo:font-family="Georgia" fo:font-weight="bold" fo:font-size="29.9pt"/>
    </style:style>
    <style:style style:name="font:georgia:bold:2.488:para" style:family="paragraph" style:parent-style-name="Text_20_body">
      <style:text-properties fo:font-family="Georgia" fo:font-weight="bold" fo:font-size="29.9pt"/>
    </style:style>
    <style:style style:name="font:georgia:bold-italic:0.6" style:family="text">
      <style:text-properties fo:font-family="Georgia" fo:font-style="italic" fo:font-weight="bold" fo:font-size="7.2pt"/>
    </style:style>
    <style:style style:name="font:georgia:bold-italic:0.6:para" style:family="paragraph" style:parent-style-name="Text_20_body">
      <style:text-properties fo:font-family="Georgia" fo:font-style="italic" fo:font-weight="bold" fo:font-size="7.2pt"/>
    </style:style>
    <style:style style:name="font:georgia:bold-italic:0.7" style:family="text">
      <style:text-properties fo:font-family="Georgia" fo:font-style="italic" fo:font-weight="bold" fo:font-size="8.4pt"/>
    </style:style>
    <style:style style:name="font:georgia:bold-italic:0.7:para" style:family="paragraph" style:parent-style-name="Text_20_body">
      <style:text-properties fo:font-family="Georgia" fo:font-style="italic" fo:font-weight="bold" fo:font-size="8.4pt"/>
    </style:style>
    <style:style style:name="font:georgia:bold-italic:0.8" style:family="text">
      <style:text-properties fo:font-family="Georgia" fo:font-style="italic" fo:font-weight="bold" fo:font-size="9.6pt"/>
    </style:style>
    <style:style style:name="font:georgia:bold-italic:0.8:para" style:family="paragraph" style:parent-style-name="Text_20_body">
      <style:text-properties fo:font-family="Georgia" fo:font-style="italic" fo:font-weight="bold" fo:font-size="9.6pt"/>
    </style:style>
    <style:style style:name="font:georgia:bold-italic:0.9" style:family="text">
      <style:text-properties fo:font-family="Georgia" fo:font-style="italic" fo:font-weight="bold" fo:font-size="10.8pt"/>
    </style:style>
    <style:style style:name="font:georgia:bold-italic:0.9:para" style:family="paragraph" style:parent-style-name="Text_20_body">
      <style:text-properties fo:font-family="Georgia" fo:font-style="italic" fo:font-weight="bold" fo:font-size="10.8pt"/>
    </style:style>
    <style:style style:name="font:georgia:bold-italic:1.0" style:family="text">
      <style:text-properties fo:font-family="Georgia" fo:font-style="italic" fo:font-weight="bold" fo:font-size="12.0pt"/>
    </style:style>
    <style:style style:name="font:georgia:bold-italic:1.0:para" style:family="paragraph" style:parent-style-name="Text_20_body">
      <style:text-properties fo:font-family="Georgia" fo:font-style="italic" fo:font-weight="bold" fo:font-size="12.0pt"/>
    </style:style>
    <style:style style:name="font:georgia:bold-italic:1.2" style:family="text">
      <style:text-properties fo:font-family="Georgia" fo:font-style="italic" fo:font-weight="bold" fo:font-size="14.4pt"/>
    </style:style>
    <style:style style:name="font:georgia:bold-italic:1.2:para" style:family="paragraph" style:parent-style-name="Text_20_body">
      <style:text-properties fo:font-family="Georgia" fo:font-style="italic" fo:font-weight="bold" fo:font-size="14.4pt"/>
    </style:style>
    <style:style style:name="font:georgia:bold-italic:1.44" style:family="text">
      <style:text-properties fo:font-family="Georgia" fo:font-style="italic" fo:font-weight="bold" fo:font-size="17.3pt"/>
    </style:style>
    <style:style style:name="font:georgia:bold-italic:1.44:para" style:family="paragraph" style:parent-style-name="Text_20_body">
      <style:text-properties fo:font-family="Georgia" fo:font-style="italic" fo:font-weight="bold" fo:font-size="17.3pt"/>
    </style:style>
    <style:style style:name="font:georgia:bold-italic:1.728" style:family="text">
      <style:text-properties fo:font-family="Georgia" fo:font-style="italic" fo:font-weight="bold" fo:font-size="20.7pt"/>
    </style:style>
    <style:style style:name="font:georgia:bold-italic:1.728:para" style:family="paragraph" style:parent-style-name="Text_20_body">
      <style:text-properties fo:font-family="Georgia" fo:font-style="italic" fo:font-weight="bold" fo:font-size="20.7pt"/>
    </style:style>
    <style:style style:name="font:georgia:bold-italic:2.074" style:family="text">
      <style:text-properties fo:font-family="Georgia" fo:font-style="italic" fo:font-weight="bold" fo:font-size="24.9pt"/>
    </style:style>
    <style:style style:name="font:georgia:bold-italic:2.074:para" style:family="paragraph" style:parent-style-name="Text_20_body">
      <style:text-properties fo:font-family="Georgia" fo:font-style="italic" fo:font-weight="bold" fo:font-size="24.9pt"/>
    </style:style>
    <style:style style:name="font:georgia:bold-italic:2.488" style:family="text">
      <style:text-properties fo:font-family="Georgia" fo:font-style="italic" fo:font-weight="bold" fo:font-size="29.9pt"/>
    </style:style>
    <style:style style:name="font:georgia:bold-italic:2.488:para" style:family="paragraph" style:parent-style-name="Text_20_body">
      <style:text-properties fo:font-family="Georgia" fo:font-style="italic" fo:font-weight="bold" fo:font-size="29.9pt"/>
    </style:style>
    <style:style style:name="font:helvetica:italic:0.6" style:family="text">
      <style:text-properties fo:font-family="Helvetica" fo:font-style="italic" fo:font-size="7.2pt"/>
    </style:style>
    <style:style style:name="font:helvetica:italic:0.6:para" style:family="paragraph" style:parent-style-name="Text_20_body">
      <style:text-properties fo:font-family="Helvetica" fo:font-style="italic" fo:font-size="7.2pt"/>
    </style:style>
    <style:style style:name="font:helvetica:italic:0.7" style:family="text">
      <style:text-properties fo:font-family="Helvetica" fo:font-style="italic" fo:font-size="8.4pt"/>
    </style:style>
    <style:style style:name="font:helvetica:italic:0.7:para" style:family="paragraph" style:parent-style-name="Text_20_body">
      <style:text-properties fo:font-family="Helvetica" fo:font-style="italic" fo:font-size="8.4pt"/>
    </style:style>
    <style:style style:name="font:helvetica:italic:0.8" style:family="text">
      <style:text-properties fo:font-family="Helvetica" fo:font-style="italic" fo:font-size="9.6pt"/>
    </style:style>
    <style:style style:name="font:helvetica:italic:0.8:para" style:family="paragraph" style:parent-style-name="Text_20_body">
      <style:text-properties fo:font-family="Helvetica" fo:font-style="italic" fo:font-size="9.6pt"/>
    </style:style>
    <style:style style:name="font:helvetica:italic:0.9" style:family="text">
      <style:text-properties fo:font-family="Helvetica" fo:font-style="italic" fo:font-size="10.8pt"/>
    </style:style>
    <style:style style:name="font:helvetica:italic:0.9:para" style:family="paragraph" style:parent-style-name="Text_20_body">
      <style:text-properties fo:font-family="Helvetica" fo:font-style="italic" fo:font-size="10.8pt"/>
    </style:style>
    <style:style style:name="font:helvetica:italic:1.0" style:family="text">
      <style:text-properties fo:font-family="Helvetica" fo:font-style="italic" fo:font-size="12.0pt"/>
    </style:style>
    <style:style style:name="font:helvetica:italic:1.0:para" style:family="paragraph" style:parent-style-name="Text_20_body">
      <style:text-properties fo:font-family="Helvetica" fo:font-style="italic" fo:font-size="12.0pt"/>
    </style:style>
    <style:style style:name="font:helvetica:italic:1.2" style:family="text">
      <style:text-properties fo:font-family="Helvetica" fo:font-style="italic" fo:font-size="14.4pt"/>
    </style:style>
    <style:style style:name="font:helvetica:italic:1.2:para" style:family="paragraph" style:parent-style-name="Text_20_body">
      <style:text-properties fo:font-family="Helvetica" fo:font-style="italic" fo:font-size="14.4pt"/>
    </style:style>
    <style:style style:name="font:helvetica:italic:1.44" style:family="text">
      <style:text-properties fo:font-family="Helvetica" fo:font-style="italic" fo:font-size="17.3pt"/>
    </style:style>
    <style:style style:name="font:helvetica:italic:1.44:para" style:family="paragraph" style:parent-style-name="Text_20_body">
      <style:text-properties fo:font-family="Helvetica" fo:font-style="italic" fo:font-size="17.3pt"/>
    </style:style>
    <style:style style:name="font:helvetica:italic:1.728" style:family="text">
      <style:text-properties fo:font-family="Helvetica" fo:font-style="italic" fo:font-size="20.7pt"/>
    </style:style>
    <style:style style:name="font:helvetica:italic:1.728:para" style:family="paragraph" style:parent-style-name="Text_20_body">
      <style:text-properties fo:font-family="Helvetica" fo:font-style="italic" fo:font-size="20.7pt"/>
    </style:style>
    <style:style style:name="font:helvetica:italic:2.074" style:family="text">
      <style:text-properties fo:font-family="Helvetica" fo:font-style="italic" fo:font-size="24.9pt"/>
    </style:style>
    <style:style style:name="font:helvetica:italic:2.074:para" style:family="paragraph" style:parent-style-name="Text_20_body">
      <style:text-properties fo:font-family="Helvetica" fo:font-style="italic" fo:font-size="24.9pt"/>
    </style:style>
    <style:style style:name="font:helvetica:italic:2.488" style:family="text">
      <style:text-properties fo:font-family="Helvetica" fo:font-style="italic" fo:font-size="29.9pt"/>
    </style:style>
    <style:style style:name="font:helvetica:italic:2.488:para" style:family="paragraph" style:parent-style-name="Text_20_body">
      <style:text-properties fo:font-family="Helvetica" fo:font-style="italic" fo:font-size="29.9pt"/>
    </style:style>
    <style:style style:name="font:helvetica:bold:0.6" style:family="text">
      <style:text-properties fo:font-family="Helvetica" fo:font-weight="bold" fo:font-size="7.2pt"/>
    </style:style>
    <style:style style:name="font:helvetica:bold:0.6:para" style:family="paragraph" style:parent-style-name="Text_20_body">
      <style:text-properties fo:font-family="Helvetica" fo:font-weight="bold" fo:font-size="7.2pt"/>
    </style:style>
    <style:style style:name="font:helvetica:bold:0.7" style:family="text">
      <style:text-properties fo:font-family="Helvetica" fo:font-weight="bold" fo:font-size="8.4pt"/>
    </style:style>
    <style:style style:name="font:helvetica:bold:0.7:para" style:family="paragraph" style:parent-style-name="Text_20_body">
      <style:text-properties fo:font-family="Helvetica" fo:font-weight="bold" fo:font-size="8.4pt"/>
    </style:style>
    <style:style style:name="font:helvetica:bold:0.8" style:family="text">
      <style:text-properties fo:font-family="Helvetica" fo:font-weight="bold" fo:font-size="9.6pt"/>
    </style:style>
    <style:style style:name="font:helvetica:bold:0.8:para" style:family="paragraph" style:parent-style-name="Text_20_body">
      <style:text-properties fo:font-family="Helvetica" fo:font-weight="bold" fo:font-size="9.6pt"/>
    </style:style>
    <style:style style:name="font:helvetica:bold:0.9" style:family="text">
      <style:text-properties fo:font-family="Helvetica" fo:font-weight="bold" fo:font-size="10.8pt"/>
    </style:style>
    <style:style style:name="font:helvetica:bold:0.9:para" style:family="paragraph" style:parent-style-name="Text_20_body">
      <style:text-properties fo:font-family="Helvetica" fo:font-weight="bold" fo:font-size="10.8pt"/>
    </style:style>
    <style:style style:name="font:helvetica:bold:1.0" style:family="text">
      <style:text-properties fo:font-family="Helvetica" fo:font-weight="bold" fo:font-size="12.0pt"/>
    </style:style>
    <style:style style:name="font:helvetica:bold:1.0:para" style:family="paragraph" style:parent-style-name="Text_20_body">
      <style:text-properties fo:font-family="Helvetica" fo:font-weight="bold" fo:font-size="12.0pt"/>
    </style:style>
    <style:style style:name="font:helvetica:bold:1.2" style:family="text">
      <style:text-properties fo:font-family="Helvetica" fo:font-weight="bold" fo:font-size="14.4pt"/>
    </style:style>
    <style:style style:name="font:helvetica:bold:1.2:para" style:family="paragraph" style:parent-style-name="Text_20_body">
      <style:text-properties fo:font-family="Helvetica" fo:font-weight="bold" fo:font-size="14.4pt"/>
    </style:style>
    <style:style style:name="font:helvetica:bold:1.44" style:family="text">
      <style:text-properties fo:font-family="Helvetica" fo:font-weight="bold" fo:font-size="17.3pt"/>
    </style:style>
    <style:style style:name="font:helvetica:bold:1.44:para" style:family="paragraph" style:parent-style-name="Text_20_body">
      <style:text-properties fo:font-family="Helvetica" fo:font-weight="bold" fo:font-size="17.3pt"/>
    </style:style>
    <style:style style:name="font:helvetica:bold:1.728" style:family="text">
      <style:text-properties fo:font-family="Helvetica" fo:font-weight="bold" fo:font-size="20.7pt"/>
    </style:style>
    <style:style style:name="font:helvetica:bold:1.728:para" style:family="paragraph" style:parent-style-name="Text_20_body">
      <style:text-properties fo:font-family="Helvetica" fo:font-weight="bold" fo:font-size="20.7pt"/>
    </style:style>
    <style:style style:name="font:helvetica:bold:2.074" style:family="text">
      <style:text-properties fo:font-family="Helvetica" fo:font-weight="bold" fo:font-size="24.9pt"/>
    </style:style>
    <style:style style:name="font:helvetica:bold:2.074:para" style:family="paragraph" style:parent-style-name="Text_20_body">
      <style:text-properties fo:font-family="Helvetica" fo:font-weight="bold" fo:font-size="24.9pt"/>
    </style:style>
    <style:style style:name="font:helvetica:bold:2.488" style:family="text">
      <style:text-properties fo:font-family="Helvetica" fo:font-weight="bold" fo:font-size="29.9pt"/>
    </style:style>
    <style:style style:name="font:helvetica:bold:2.488:para" style:family="paragraph" style:parent-style-name="Text_20_body">
      <style:text-properties fo:font-family="Helvetica" fo:font-weight="bold" fo:font-size="29.9pt"/>
    </style:style>
    <style:style style:name="font:helvetica:bold-italic:0.6" style:family="text">
      <style:text-properties fo:font-family="Helvetica" fo:font-style="italic" fo:font-weight="bold" fo:font-size="7.2pt"/>
    </style:style>
    <style:style style:name="font:helvetica:bold-italic:0.6:para" style:family="paragraph" style:parent-style-name="Text_20_body">
      <style:text-properties fo:font-family="Helvetica" fo:font-style="italic" fo:font-weight="bold" fo:font-size="7.2pt"/>
    </style:style>
    <style:style style:name="font:helvetica:bold-italic:0.7" style:family="text">
      <style:text-properties fo:font-family="Helvetica" fo:font-style="italic" fo:font-weight="bold" fo:font-size="8.4pt"/>
    </style:style>
    <style:style style:name="font:helvetica:bold-italic:0.7:para" style:family="paragraph" style:parent-style-name="Text_20_body">
      <style:text-properties fo:font-family="Helvetica" fo:font-style="italic" fo:font-weight="bold" fo:font-size="8.4pt"/>
    </style:style>
    <style:style style:name="font:helvetica:bold-italic:0.8" style:family="text">
      <style:text-properties fo:font-family="Helvetica" fo:font-style="italic" fo:font-weight="bold" fo:font-size="9.6pt"/>
    </style:style>
    <style:style style:name="font:helvetica:bold-italic:0.8:para" style:family="paragraph" style:parent-style-name="Text_20_body">
      <style:text-properties fo:font-family="Helvetica" fo:font-style="italic" fo:font-weight="bold" fo:font-size="9.6pt"/>
    </style:style>
    <style:style style:name="font:helvetica:bold-italic:0.9" style:family="text">
      <style:text-properties fo:font-family="Helvetica" fo:font-style="italic" fo:font-weight="bold" fo:font-size="10.8pt"/>
    </style:style>
    <style:style style:name="font:helvetica:bold-italic:0.9:para" style:family="paragraph" style:parent-style-name="Text_20_body">
      <style:text-properties fo:font-family="Helvetica" fo:font-style="italic" fo:font-weight="bold" fo:font-size="10.8pt"/>
    </style:style>
    <style:style style:name="font:helvetica:bold-italic:1.0" style:family="text">
      <style:text-properties fo:font-family="Helvetica" fo:font-style="italic" fo:font-weight="bold" fo:font-size="12.0pt"/>
    </style:style>
    <style:style style:name="font:helvetica:bold-italic:1.0:para" style:family="paragraph" style:parent-style-name="Text_20_body">
      <style:text-properties fo:font-family="Helvetica" fo:font-style="italic" fo:font-weight="bold" fo:font-size="12.0pt"/>
    </style:style>
    <style:style style:name="font:helvetica:bold-italic:1.2" style:family="text">
      <style:text-properties fo:font-family="Helvetica" fo:font-style="italic" fo:font-weight="bold" fo:font-size="14.4pt"/>
    </style:style>
    <style:style style:name="font:helvetica:bold-italic:1.2:para" style:family="paragraph" style:parent-style-name="Text_20_body">
      <style:text-properties fo:font-family="Helvetica" fo:font-style="italic" fo:font-weight="bold" fo:font-size="14.4pt"/>
    </style:style>
    <style:style style:name="font:helvetica:bold-italic:1.44" style:family="text">
      <style:text-properties fo:font-family="Helvetica" fo:font-style="italic" fo:font-weight="bold" fo:font-size="17.3pt"/>
    </style:style>
    <style:style style:name="font:helvetica:bold-italic:1.44:para" style:family="paragraph" style:parent-style-name="Text_20_body">
      <style:text-properties fo:font-family="Helvetica" fo:font-style="italic" fo:font-weight="bold" fo:font-size="17.3pt"/>
    </style:style>
    <style:style style:name="font:helvetica:bold-italic:1.728" style:family="text">
      <style:text-properties fo:font-family="Helvetica" fo:font-style="italic" fo:font-weight="bold" fo:font-size="20.7pt"/>
    </style:style>
    <style:style style:name="font:helvetica:bold-italic:1.728:para" style:family="paragraph" style:parent-style-name="Text_20_body">
      <style:text-properties fo:font-family="Helvetica" fo:font-style="italic" fo:font-weight="bold" fo:font-size="20.7pt"/>
    </style:style>
    <style:style style:name="font:helvetica:bold-italic:2.074" style:family="text">
      <style:text-properties fo:font-family="Helvetica" fo:font-style="italic" fo:font-weight="bold" fo:font-size="24.9pt"/>
    </style:style>
    <style:style style:name="font:helvetica:bold-italic:2.074:para" style:family="paragraph" style:parent-style-name="Text_20_body">
      <style:text-properties fo:font-family="Helvetica" fo:font-style="italic" fo:font-weight="bold" fo:font-size="24.9pt"/>
    </style:style>
    <style:style style:name="font:helvetica:bold-italic:2.488" style:family="text">
      <style:text-properties fo:font-family="Helvetica" fo:font-style="italic" fo:font-weight="bold" fo:font-size="29.9pt"/>
    </style:style>
    <style:style style:name="font:helvetica:bold-italic:2.488:para" style:family="paragraph" style:parent-style-name="Text_20_body">
      <style:text-properties fo:font-family="Helvetica" fo:font-style="italic" fo:font-weight="bold" fo:font-size="29.9pt"/>
    </style:style>
    <style:style style:name="font:helvetica-neue:italic:0.6" style:family="text">
      <style:text-properties fo:font-family="Helvetica Neue" fo:font-style="italic" fo:font-size="7.2pt"/>
    </style:style>
    <style:style style:name="font:helvetica-neue:italic:0.6:para" style:family="paragraph" style:parent-style-name="Text_20_body">
      <style:text-properties fo:font-family="Helvetica Neue" fo:font-style="italic" fo:font-size="7.2pt"/>
    </style:style>
    <style:style style:name="font:helvetica-neue:italic:0.7" style:family="text">
      <style:text-properties fo:font-family="Helvetica Neue" fo:font-style="italic" fo:font-size="8.4pt"/>
    </style:style>
    <style:style style:name="font:helvetica-neue:italic:0.7:para" style:family="paragraph" style:parent-style-name="Text_20_body">
      <style:text-properties fo:font-family="Helvetica Neue" fo:font-style="italic" fo:font-size="8.4pt"/>
    </style:style>
    <style:style style:name="font:helvetica-neue:italic:0.8" style:family="text">
      <style:text-properties fo:font-family="Helvetica Neue" fo:font-style="italic" fo:font-size="9.6pt"/>
    </style:style>
    <style:style style:name="font:helvetica-neue:italic:0.8:para" style:family="paragraph" style:parent-style-name="Text_20_body">
      <style:text-properties fo:font-family="Helvetica Neue" fo:font-style="italic" fo:font-size="9.6pt"/>
    </style:style>
    <style:style style:name="font:helvetica-neue:italic:0.9" style:family="text">
      <style:text-properties fo:font-family="Helvetica Neue" fo:font-style="italic" fo:font-size="10.8pt"/>
    </style:style>
    <style:style style:name="font:helvetica-neue:italic:0.9:para" style:family="paragraph" style:parent-style-name="Text_20_body">
      <style:text-properties fo:font-family="Helvetica Neue" fo:font-style="italic" fo:font-size="10.8pt"/>
    </style:style>
    <style:style style:name="font:helvetica-neue:italic:1.0" style:family="text">
      <style:text-properties fo:font-family="Helvetica Neue" fo:font-style="italic" fo:font-size="12.0pt"/>
    </style:style>
    <style:style style:name="font:helvetica-neue:italic:1.0:para" style:family="paragraph" style:parent-style-name="Text_20_body">
      <style:text-properties fo:font-family="Helvetica Neue" fo:font-style="italic" fo:font-size="12.0pt"/>
    </style:style>
    <style:style style:name="font:helvetica-neue:italic:1.2" style:family="text">
      <style:text-properties fo:font-family="Helvetica Neue" fo:font-style="italic" fo:font-size="14.4pt"/>
    </style:style>
    <style:style style:name="font:helvetica-neue:italic:1.2:para" style:family="paragraph" style:parent-style-name="Text_20_body">
      <style:text-properties fo:font-family="Helvetica Neue" fo:font-style="italic" fo:font-size="14.4pt"/>
    </style:style>
    <style:style style:name="font:helvetica-neue:italic:1.44" style:family="text">
      <style:text-properties fo:font-family="Helvetica Neue" fo:font-style="italic" fo:font-size="17.3pt"/>
    </style:style>
    <style:style style:name="font:helvetica-neue:italic:1.44:para" style:family="paragraph" style:parent-style-name="Text_20_body">
      <style:text-properties fo:font-family="Helvetica Neue" fo:font-style="italic" fo:font-size="17.3pt"/>
    </style:style>
    <style:style style:name="font:helvetica-neue:italic:1.728" style:family="text">
      <style:text-properties fo:font-family="Helvetica Neue" fo:font-style="italic" fo:font-size="20.7pt"/>
    </style:style>
    <style:style style:name="font:helvetica-neue:italic:1.728:para" style:family="paragraph" style:parent-style-name="Text_20_body">
      <style:text-properties fo:font-family="Helvetica Neue" fo:font-style="italic" fo:font-size="20.7pt"/>
    </style:style>
    <style:style style:name="font:helvetica-neue:italic:2.074" style:family="text">
      <style:text-properties fo:font-family="Helvetica Neue" fo:font-style="italic" fo:font-size="24.9pt"/>
    </style:style>
    <style:style style:name="font:helvetica-neue:italic:2.074:para" style:family="paragraph" style:parent-style-name="Text_20_body">
      <style:text-properties fo:font-family="Helvetica Neue" fo:font-style="italic" fo:font-size="24.9pt"/>
    </style:style>
    <style:style style:name="font:helvetica-neue:italic:2.488" style:family="text">
      <style:text-properties fo:font-family="Helvetica Neue" fo:font-style="italic" fo:font-size="29.9pt"/>
    </style:style>
    <style:style style:name="font:helvetica-neue:italic:2.488:para" style:family="paragraph" style:parent-style-name="Text_20_body">
      <style:text-properties fo:font-family="Helvetica Neue" fo:font-style="italic" fo:font-size="29.9pt"/>
    </style:style>
    <style:style style:name="font:helvetica-neue:bold:0.6" style:family="text">
      <style:text-properties fo:font-family="Helvetica Neue" fo:font-weight="bold" fo:font-size="7.2pt"/>
    </style:style>
    <style:style style:name="font:helvetica-neue:bold:0.6:para" style:family="paragraph" style:parent-style-name="Text_20_body">
      <style:text-properties fo:font-family="Helvetica Neue" fo:font-weight="bold" fo:font-size="7.2pt"/>
    </style:style>
    <style:style style:name="font:helvetica-neue:bold:0.7" style:family="text">
      <style:text-properties fo:font-family="Helvetica Neue" fo:font-weight="bold" fo:font-size="8.4pt"/>
    </style:style>
    <style:style style:name="font:helvetica-neue:bold:0.7:para" style:family="paragraph" style:parent-style-name="Text_20_body">
      <style:text-properties fo:font-family="Helvetica Neue" fo:font-weight="bold" fo:font-size="8.4pt"/>
    </style:style>
    <style:style style:name="font:helvetica-neue:bold:0.8" style:family="text">
      <style:text-properties fo:font-family="Helvetica Neue" fo:font-weight="bold" fo:font-size="9.6pt"/>
    </style:style>
    <style:style style:name="font:helvetica-neue:bold:0.8:para" style:family="paragraph" style:parent-style-name="Text_20_body">
      <style:text-properties fo:font-family="Helvetica Neue" fo:font-weight="bold" fo:font-size="9.6pt"/>
    </style:style>
    <style:style style:name="font:helvetica-neue:bold:0.9" style:family="text">
      <style:text-properties fo:font-family="Helvetica Neue" fo:font-weight="bold" fo:font-size="10.8pt"/>
    </style:style>
    <style:style style:name="font:helvetica-neue:bold:0.9:para" style:family="paragraph" style:parent-style-name="Text_20_body">
      <style:text-properties fo:font-family="Helvetica Neue" fo:font-weight="bold" fo:font-size="10.8pt"/>
    </style:style>
    <style:style style:name="font:helvetica-neue:bold:1.0" style:family="text">
      <style:text-properties fo:font-family="Helvetica Neue" fo:font-weight="bold" fo:font-size="12.0pt"/>
    </style:style>
    <style:style style:name="font:helvetica-neue:bold:1.0:para" style:family="paragraph" style:parent-style-name="Text_20_body">
      <style:text-properties fo:font-family="Helvetica Neue" fo:font-weight="bold" fo:font-size="12.0pt"/>
    </style:style>
    <style:style style:name="font:helvetica-neue:bold:1.2" style:family="text">
      <style:text-properties fo:font-family="Helvetica Neue" fo:font-weight="bold" fo:font-size="14.4pt"/>
    </style:style>
    <style:style style:name="font:helvetica-neue:bold:1.2:para" style:family="paragraph" style:parent-style-name="Text_20_body">
      <style:text-properties fo:font-family="Helvetica Neue" fo:font-weight="bold" fo:font-size="14.4pt"/>
    </style:style>
    <style:style style:name="font:helvetica-neue:bold:1.44" style:family="text">
      <style:text-properties fo:font-family="Helvetica Neue" fo:font-weight="bold" fo:font-size="17.3pt"/>
    </style:style>
    <style:style style:name="font:helvetica-neue:bold:1.44:para" style:family="paragraph" style:parent-style-name="Text_20_body">
      <style:text-properties fo:font-family="Helvetica Neue" fo:font-weight="bold" fo:font-size="17.3pt"/>
    </style:style>
    <style:style style:name="font:helvetica-neue:bold:1.728" style:family="text">
      <style:text-properties fo:font-family="Helvetica Neue" fo:font-weight="bold" fo:font-size="20.7pt"/>
    </style:style>
    <style:style style:name="font:helvetica-neue:bold:1.728:para" style:family="paragraph" style:parent-style-name="Text_20_body">
      <style:text-properties fo:font-family="Helvetica Neue" fo:font-weight="bold" fo:font-size="20.7pt"/>
    </style:style>
    <style:style style:name="font:helvetica-neue:bold:2.074" style:family="text">
      <style:text-properties fo:font-family="Helvetica Neue" fo:font-weight="bold" fo:font-size="24.9pt"/>
    </style:style>
    <style:style style:name="font:helvetica-neue:bold:2.074:para" style:family="paragraph" style:parent-style-name="Text_20_body">
      <style:text-properties fo:font-family="Helvetica Neue" fo:font-weight="bold" fo:font-size="24.9pt"/>
    </style:style>
    <style:style style:name="font:helvetica-neue:bold:2.488" style:family="text">
      <style:text-properties fo:font-family="Helvetica Neue" fo:font-weight="bold" fo:font-size="29.9pt"/>
    </style:style>
    <style:style style:name="font:helvetica-neue:bold:2.488:para" style:family="paragraph" style:parent-style-name="Text_20_body">
      <style:text-properties fo:font-family="Helvetica Neue" fo:font-weight="bold" fo:font-size="29.9pt"/>
    </style:style>
    <style:style style:name="font:helvetica-neue:bold-italic:0.6" style:family="text">
      <style:text-properties fo:font-family="Helvetica Neue" fo:font-style="italic" fo:font-weight="bold" fo:font-size="7.2pt"/>
    </style:style>
    <style:style style:name="font:helvetica-neue:bold-italic:0.6:para" style:family="paragraph" style:parent-style-name="Text_20_body">
      <style:text-properties fo:font-family="Helvetica Neue" fo:font-style="italic" fo:font-weight="bold" fo:font-size="7.2pt"/>
    </style:style>
    <style:style style:name="font:helvetica-neue:bold-italic:0.7" style:family="text">
      <style:text-properties fo:font-family="Helvetica Neue" fo:font-style="italic" fo:font-weight="bold" fo:font-size="8.4pt"/>
    </style:style>
    <style:style style:name="font:helvetica-neue:bold-italic:0.7:para" style:family="paragraph" style:parent-style-name="Text_20_body">
      <style:text-properties fo:font-family="Helvetica Neue" fo:font-style="italic" fo:font-weight="bold" fo:font-size="8.4pt"/>
    </style:style>
    <style:style style:name="font:helvetica-neue:bold-italic:0.8" style:family="text">
      <style:text-properties fo:font-family="Helvetica Neue" fo:font-style="italic" fo:font-weight="bold" fo:font-size="9.6pt"/>
    </style:style>
    <style:style style:name="font:helvetica-neue:bold-italic:0.8:para" style:family="paragraph" style:parent-style-name="Text_20_body">
      <style:text-properties fo:font-family="Helvetica Neue" fo:font-style="italic" fo:font-weight="bold" fo:font-size="9.6pt"/>
    </style:style>
    <style:style style:name="font:helvetica-neue:bold-italic:0.9" style:family="text">
      <style:text-properties fo:font-family="Helvetica Neue" fo:font-style="italic" fo:font-weight="bold" fo:font-size="10.8pt"/>
    </style:style>
    <style:style style:name="font:helvetica-neue:bold-italic:0.9:para" style:family="paragraph" style:parent-style-name="Text_20_body">
      <style:text-properties fo:font-family="Helvetica Neue" fo:font-style="italic" fo:font-weight="bold" fo:font-size="10.8pt"/>
    </style:style>
    <style:style style:name="font:helvetica-neue:bold-italic:1.0" style:family="text">
      <style:text-properties fo:font-family="Helvetica Neue" fo:font-style="italic" fo:font-weight="bold" fo:font-size="12.0pt"/>
    </style:style>
    <style:style style:name="font:helvetica-neue:bold-italic:1.0:para" style:family="paragraph" style:parent-style-name="Text_20_body">
      <style:text-properties fo:font-family="Helvetica Neue" fo:font-style="italic" fo:font-weight="bold" fo:font-size="12.0pt"/>
    </style:style>
    <style:style style:name="font:helvetica-neue:bold-italic:1.2" style:family="text">
      <style:text-properties fo:font-family="Helvetica Neue" fo:font-style="italic" fo:font-weight="bold" fo:font-size="14.4pt"/>
    </style:style>
    <style:style style:name="font:helvetica-neue:bold-italic:1.2:para" style:family="paragraph" style:parent-style-name="Text_20_body">
      <style:text-properties fo:font-family="Helvetica Neue" fo:font-style="italic" fo:font-weight="bold" fo:font-size="14.4pt"/>
    </style:style>
    <style:style style:name="font:helvetica-neue:bold-italic:1.44" style:family="text">
      <style:text-properties fo:font-family="Helvetica Neue" fo:font-style="italic" fo:font-weight="bold" fo:font-size="17.3pt"/>
    </style:style>
    <style:style style:name="font:helvetica-neue:bold-italic:1.44:para" style:family="paragraph" style:parent-style-name="Text_20_body">
      <style:text-properties fo:font-family="Helvetica Neue" fo:font-style="italic" fo:font-weight="bold" fo:font-size="17.3pt"/>
    </style:style>
    <style:style style:name="font:helvetica-neue:bold-italic:1.728" style:family="text">
      <style:text-properties fo:font-family="Helvetica Neue" fo:font-style="italic" fo:font-weight="bold" fo:font-size="20.7pt"/>
    </style:style>
    <style:style style:name="font:helvetica-neue:bold-italic:1.728:para" style:family="paragraph" style:parent-style-name="Text_20_body">
      <style:text-properties fo:font-family="Helvetica Neue" fo:font-style="italic" fo:font-weight="bold" fo:font-size="20.7pt"/>
    </style:style>
    <style:style style:name="font:helvetica-neue:bold-italic:2.074" style:family="text">
      <style:text-properties fo:font-family="Helvetica Neue" fo:font-style="italic" fo:font-weight="bold" fo:font-size="24.9pt"/>
    </style:style>
    <style:style style:name="font:helvetica-neue:bold-italic:2.074:para" style:family="paragraph" style:parent-style-name="Text_20_body">
      <style:text-properties fo:font-family="Helvetica Neue" fo:font-style="italic" fo:font-weight="bold" fo:font-size="24.9pt"/>
    </style:style>
    <style:style style:name="font:helvetica-neue:bold-italic:2.488" style:family="text">
      <style:text-properties fo:font-family="Helvetica Neue" fo:font-style="italic" fo:font-weight="bold" fo:font-size="29.9pt"/>
    </style:style>
    <style:style style:name="font:helvetica-neue:bold-italic:2.488:para" style:family="paragraph" style:parent-style-name="Text_20_body">
      <style:text-properties fo:font-family="Helvetica Neue" fo:font-style="italic" fo:font-weight="bold" fo:font-size="29.9pt"/>
    </style:style>
    <style:style style:name="font:palatino-linotype:italic:0.6" style:family="text">
      <style:text-properties fo:font-family="Palatino Linotype" fo:font-style="italic" fo:font-size="7.2pt"/>
    </style:style>
    <style:style style:name="font:palatino-linotype:italic:0.6:para" style:family="paragraph" style:parent-style-name="Text_20_body">
      <style:text-properties fo:font-family="Palatino Linotype" fo:font-style="italic" fo:font-size="7.2pt"/>
    </style:style>
    <style:style style:name="font:palatino-linotype:italic:0.7" style:family="text">
      <style:text-properties fo:font-family="Palatino Linotype" fo:font-style="italic" fo:font-size="8.4pt"/>
    </style:style>
    <style:style style:name="font:palatino-linotype:italic:0.7:para" style:family="paragraph" style:parent-style-name="Text_20_body">
      <style:text-properties fo:font-family="Palatino Linotype" fo:font-style="italic" fo:font-size="8.4pt"/>
    </style:style>
    <style:style style:name="font:palatino-linotype:italic:0.8" style:family="text">
      <style:text-properties fo:font-family="Palatino Linotype" fo:font-style="italic" fo:font-size="9.6pt"/>
    </style:style>
    <style:style style:name="font:palatino-linotype:italic:0.8:para" style:family="paragraph" style:parent-style-name="Text_20_body">
      <style:text-properties fo:font-family="Palatino Linotype" fo:font-style="italic" fo:font-size="9.6pt"/>
    </style:style>
    <style:style style:name="font:palatino-linotype:italic:0.9" style:family="text">
      <style:text-properties fo:font-family="Palatino Linotype" fo:font-style="italic" fo:font-size="10.8pt"/>
    </style:style>
    <style:style style:name="font:palatino-linotype:italic:0.9:para" style:family="paragraph" style:parent-style-name="Text_20_body">
      <style:text-properties fo:font-family="Palatino Linotype" fo:font-style="italic" fo:font-size="10.8pt"/>
    </style:style>
    <style:style style:name="font:palatino-linotype:italic:1.0" style:family="text">
      <style:text-properties fo:font-family="Palatino Linotype" fo:font-style="italic" fo:font-size="12.0pt"/>
    </style:style>
    <style:style style:name="font:palatino-linotype:italic:1.0:para" style:family="paragraph" style:parent-style-name="Text_20_body">
      <style:text-properties fo:font-family="Palatino Linotype" fo:font-style="italic" fo:font-size="12.0pt"/>
    </style:style>
    <style:style style:name="font:palatino-linotype:italic:1.2" style:family="text">
      <style:text-properties fo:font-family="Palatino Linotype" fo:font-style="italic" fo:font-size="14.4pt"/>
    </style:style>
    <style:style style:name="font:palatino-linotype:italic:1.2:para" style:family="paragraph" style:parent-style-name="Text_20_body">
      <style:text-properties fo:font-family="Palatino Linotype" fo:font-style="italic" fo:font-size="14.4pt"/>
    </style:style>
    <style:style style:name="font:palatino-linotype:italic:1.44" style:family="text">
      <style:text-properties fo:font-family="Palatino Linotype" fo:font-style="italic" fo:font-size="17.3pt"/>
    </style:style>
    <style:style style:name="font:palatino-linotype:italic:1.44:para" style:family="paragraph" style:parent-style-name="Text_20_body">
      <style:text-properties fo:font-family="Palatino Linotype" fo:font-style="italic" fo:font-size="17.3pt"/>
    </style:style>
    <style:style style:name="font:palatino-linotype:italic:1.728" style:family="text">
      <style:text-properties fo:font-family="Palatino Linotype" fo:font-style="italic" fo:font-size="20.7pt"/>
    </style:style>
    <style:style style:name="font:palatino-linotype:italic:1.728:para" style:family="paragraph" style:parent-style-name="Text_20_body">
      <style:text-properties fo:font-family="Palatino Linotype" fo:font-style="italic" fo:font-size="20.7pt"/>
    </style:style>
    <style:style style:name="font:palatino-linotype:italic:2.074" style:family="text">
      <style:text-properties fo:font-family="Palatino Linotype" fo:font-style="italic" fo:font-size="24.9pt"/>
    </style:style>
    <style:style style:name="font:palatino-linotype:italic:2.074:para" style:family="paragraph" style:parent-style-name="Text_20_body">
      <style:text-properties fo:font-family="Palatino Linotype" fo:font-style="italic" fo:font-size="24.9pt"/>
    </style:style>
    <style:style style:name="font:palatino-linotype:italic:2.488" style:family="text">
      <style:text-properties fo:font-family="Palatino Linotype" fo:font-style="italic" fo:font-size="29.9pt"/>
    </style:style>
    <style:style style:name="font:palatino-linotype:italic:2.488:para" style:family="paragraph" style:parent-style-name="Text_20_body">
      <style:text-properties fo:font-family="Palatino Linotype" fo:font-style="italic" fo:font-size="29.9pt"/>
    </style:style>
    <style:style style:name="font:palatino-linotype:bold:0.6" style:family="text">
      <style:text-properties fo:font-family="Palatino Linotype" fo:font-weight="bold" fo:font-size="7.2pt"/>
    </style:style>
    <style:style style:name="font:palatino-linotype:bold:0.6:para" style:family="paragraph" style:parent-style-name="Text_20_body">
      <style:text-properties fo:font-family="Palatino Linotype" fo:font-weight="bold" fo:font-size="7.2pt"/>
    </style:style>
    <style:style style:name="font:palatino-linotype:bold:0.7" style:family="text">
      <style:text-properties fo:font-family="Palatino Linotype" fo:font-weight="bold" fo:font-size="8.4pt"/>
    </style:style>
    <style:style style:name="font:palatino-linotype:bold:0.7:para" style:family="paragraph" style:parent-style-name="Text_20_body">
      <style:text-properties fo:font-family="Palatino Linotype" fo:font-weight="bold" fo:font-size="8.4pt"/>
    </style:style>
    <style:style style:name="font:palatino-linotype:bold:0.8" style:family="text">
      <style:text-properties fo:font-family="Palatino Linotype" fo:font-weight="bold" fo:font-size="9.6pt"/>
    </style:style>
    <style:style style:name="font:palatino-linotype:bold:0.8:para" style:family="paragraph" style:parent-style-name="Text_20_body">
      <style:text-properties fo:font-family="Palatino Linotype" fo:font-weight="bold" fo:font-size="9.6pt"/>
    </style:style>
    <style:style style:name="font:palatino-linotype:bold:0.9" style:family="text">
      <style:text-properties fo:font-family="Palatino Linotype" fo:font-weight="bold" fo:font-size="10.8pt"/>
    </style:style>
    <style:style style:name="font:palatino-linotype:bold:0.9:para" style:family="paragraph" style:parent-style-name="Text_20_body">
      <style:text-properties fo:font-family="Palatino Linotype" fo:font-weight="bold" fo:font-size="10.8pt"/>
    </style:style>
    <style:style style:name="font:palatino-linotype:bold:1.0" style:family="text">
      <style:text-properties fo:font-family="Palatino Linotype" fo:font-weight="bold" fo:font-size="12.0pt"/>
    </style:style>
    <style:style style:name="font:palatino-linotype:bold:1.0:para" style:family="paragraph" style:parent-style-name="Text_20_body">
      <style:text-properties fo:font-family="Palatino Linotype" fo:font-weight="bold" fo:font-size="12.0pt"/>
    </style:style>
    <style:style style:name="font:palatino-linotype:bold:1.2" style:family="text">
      <style:text-properties fo:font-family="Palatino Linotype" fo:font-weight="bold" fo:font-size="14.4pt"/>
    </style:style>
    <style:style style:name="font:palatino-linotype:bold:1.2:para" style:family="paragraph" style:parent-style-name="Text_20_body">
      <style:text-properties fo:font-family="Palatino Linotype" fo:font-weight="bold" fo:font-size="14.4pt"/>
    </style:style>
    <style:style style:name="font:palatino-linotype:bold:1.44" style:family="text">
      <style:text-properties fo:font-family="Palatino Linotype" fo:font-weight="bold" fo:font-size="17.3pt"/>
    </style:style>
    <style:style style:name="font:palatino-linotype:bold:1.44:para" style:family="paragraph" style:parent-style-name="Text_20_body">
      <style:text-properties fo:font-family="Palatino Linotype" fo:font-weight="bold" fo:font-size="17.3pt"/>
    </style:style>
    <style:style style:name="font:palatino-linotype:bold:1.728" style:family="text">
      <style:text-properties fo:font-family="Palatino Linotype" fo:font-weight="bold" fo:font-size="20.7pt"/>
    </style:style>
    <style:style style:name="font:palatino-linotype:bold:1.728:para" style:family="paragraph" style:parent-style-name="Text_20_body">
      <style:text-properties fo:font-family="Palatino Linotype" fo:font-weight="bold" fo:font-size="20.7pt"/>
    </style:style>
    <style:style style:name="font:palatino-linotype:bold:2.074" style:family="text">
      <style:text-properties fo:font-family="Palatino Linotype" fo:font-weight="bold" fo:font-size="24.9pt"/>
    </style:style>
    <style:style style:name="font:palatino-linotype:bold:2.074:para" style:family="paragraph" style:parent-style-name="Text_20_body">
      <style:text-properties fo:font-family="Palatino Linotype" fo:font-weight="bold" fo:font-size="24.9pt"/>
    </style:style>
    <style:style style:name="font:palatino-linotype:bold:2.488" style:family="text">
      <style:text-properties fo:font-family="Palatino Linotype" fo:font-weight="bold" fo:font-size="29.9pt"/>
    </style:style>
    <style:style style:name="font:palatino-linotype:bold:2.488:para" style:family="paragraph" style:parent-style-name="Text_20_body">
      <style:text-properties fo:font-family="Palatino Linotype" fo:font-weight="bold" fo:font-size="29.9pt"/>
    </style:style>
    <style:style style:name="font:palatino-linotype:bold-italic:0.6" style:family="text">
      <style:text-properties fo:font-family="Palatino Linotype" fo:font-style="italic" fo:font-weight="bold" fo:font-size="7.2pt"/>
    </style:style>
    <style:style style:name="font:palatino-linotype:bold-italic:0.6:para" style:family="paragraph" style:parent-style-name="Text_20_body">
      <style:text-properties fo:font-family="Palatino Linotype" fo:font-style="italic" fo:font-weight="bold" fo:font-size="7.2pt"/>
    </style:style>
    <style:style style:name="font:palatino-linotype:bold-italic:0.7" style:family="text">
      <style:text-properties fo:font-family="Palatino Linotype" fo:font-style="italic" fo:font-weight="bold" fo:font-size="8.4pt"/>
    </style:style>
    <style:style style:name="font:palatino-linotype:bold-italic:0.7:para" style:family="paragraph" style:parent-style-name="Text_20_body">
      <style:text-properties fo:font-family="Palatino Linotype" fo:font-style="italic" fo:font-weight="bold" fo:font-size="8.4pt"/>
    </style:style>
    <style:style style:name="font:palatino-linotype:bold-italic:0.8" style:family="text">
      <style:text-properties fo:font-family="Palatino Linotype" fo:font-style="italic" fo:font-weight="bold" fo:font-size="9.6pt"/>
    </style:style>
    <style:style style:name="font:palatino-linotype:bold-italic:0.8:para" style:family="paragraph" style:parent-style-name="Text_20_body">
      <style:text-properties fo:font-family="Palatino Linotype" fo:font-style="italic" fo:font-weight="bold" fo:font-size="9.6pt"/>
    </style:style>
    <style:style style:name="font:palatino-linotype:bold-italic:0.9" style:family="text">
      <style:text-properties fo:font-family="Palatino Linotype" fo:font-style="italic" fo:font-weight="bold" fo:font-size="10.8pt"/>
    </style:style>
    <style:style style:name="font:palatino-linotype:bold-italic:0.9:para" style:family="paragraph" style:parent-style-name="Text_20_body">
      <style:text-properties fo:font-family="Palatino Linotype" fo:font-style="italic" fo:font-weight="bold" fo:font-size="10.8pt"/>
    </style:style>
    <style:style style:name="font:palatino-linotype:bold-italic:1.0" style:family="text">
      <style:text-properties fo:font-family="Palatino Linotype" fo:font-style="italic" fo:font-weight="bold" fo:font-size="12.0pt"/>
    </style:style>
    <style:style style:name="font:palatino-linotype:bold-italic:1.0:para" style:family="paragraph" style:parent-style-name="Text_20_body">
      <style:text-properties fo:font-family="Palatino Linotype" fo:font-style="italic" fo:font-weight="bold" fo:font-size="12.0pt"/>
    </style:style>
    <style:style style:name="font:palatino-linotype:bold-italic:1.2" style:family="text">
      <style:text-properties fo:font-family="Palatino Linotype" fo:font-style="italic" fo:font-weight="bold" fo:font-size="14.4pt"/>
    </style:style>
    <style:style style:name="font:palatino-linotype:bold-italic:1.2:para" style:family="paragraph" style:parent-style-name="Text_20_body">
      <style:text-properties fo:font-family="Palatino Linotype" fo:font-style="italic" fo:font-weight="bold" fo:font-size="14.4pt"/>
    </style:style>
    <style:style style:name="font:palatino-linotype:bold-italic:1.44" style:family="text">
      <style:text-properties fo:font-family="Palatino Linotype" fo:font-style="italic" fo:font-weight="bold" fo:font-size="17.3pt"/>
    </style:style>
    <style:style style:name="font:palatino-linotype:bold-italic:1.44:para" style:family="paragraph" style:parent-style-name="Text_20_body">
      <style:text-properties fo:font-family="Palatino Linotype" fo:font-style="italic" fo:font-weight="bold" fo:font-size="17.3pt"/>
    </style:style>
    <style:style style:name="font:palatino-linotype:bold-italic:1.728" style:family="text">
      <style:text-properties fo:font-family="Palatino Linotype" fo:font-style="italic" fo:font-weight="bold" fo:font-size="20.7pt"/>
    </style:style>
    <style:style style:name="font:palatino-linotype:bold-italic:1.728:para" style:family="paragraph" style:parent-style-name="Text_20_body">
      <style:text-properties fo:font-family="Palatino Linotype" fo:font-style="italic" fo:font-weight="bold" fo:font-size="20.7pt"/>
    </style:style>
    <style:style style:name="font:palatino-linotype:bold-italic:2.074" style:family="text">
      <style:text-properties fo:font-family="Palatino Linotype" fo:font-style="italic" fo:font-weight="bold" fo:font-size="24.9pt"/>
    </style:style>
    <style:style style:name="font:palatino-linotype:bold-italic:2.074:para" style:family="paragraph" style:parent-style-name="Text_20_body">
      <style:text-properties fo:font-family="Palatino Linotype" fo:font-style="italic" fo:font-weight="bold" fo:font-size="24.9pt"/>
    </style:style>
    <style:style style:name="font:palatino-linotype:bold-italic:2.488" style:family="text">
      <style:text-properties fo:font-family="Palatino Linotype" fo:font-style="italic" fo:font-weight="bold" fo:font-size="29.9pt"/>
    </style:style>
    <style:style style:name="font:palatino-linotype:bold-italic:2.488:para" style:family="paragraph" style:parent-style-name="Text_20_body">
      <style:text-properties fo:font-family="Palatino Linotype" fo:font-style="italic" fo:font-weight="bold" fo:font-size="29.9pt"/>
    </style:style>
    <style:style style:name="font:times-new-roman:italic:0.6" style:family="text">
      <style:text-properties fo:font-family="Times New Roman" fo:font-style="italic" fo:font-size="7.2pt"/>
    </style:style>
    <style:style style:name="font:times-new-roman:italic:0.6:para" style:family="paragraph" style:parent-style-name="Text_20_body">
      <style:text-properties fo:font-family="Times New Roman" fo:font-style="italic" fo:font-size="7.2pt"/>
    </style:style>
    <style:style style:name="font:times-new-roman:italic:0.7" style:family="text">
      <style:text-properties fo:font-family="Times New Roman" fo:font-style="italic" fo:font-size="8.4pt"/>
    </style:style>
    <style:style style:name="font:times-new-roman:italic:0.7:para" style:family="paragraph" style:parent-style-name="Text_20_body">
      <style:text-properties fo:font-family="Times New Roman" fo:font-style="italic" fo:font-size="8.4pt"/>
    </style:style>
    <style:style style:name="font:times-new-roman:italic:0.8" style:family="text">
      <style:text-properties fo:font-family="Times New Roman" fo:font-style="italic" fo:font-size="9.6pt"/>
    </style:style>
    <style:style style:name="font:times-new-roman:italic:0.8:para" style:family="paragraph" style:parent-style-name="Text_20_body">
      <style:text-properties fo:font-family="Times New Roman" fo:font-style="italic" fo:font-size="9.6pt"/>
    </style:style>
    <style:style style:name="font:times-new-roman:italic:0.9" style:family="text">
      <style:text-properties fo:font-family="Times New Roman" fo:font-style="italic" fo:font-size="10.8pt"/>
    </style:style>
    <style:style style:name="font:times-new-roman:italic:0.9:para" style:family="paragraph" style:parent-style-name="Text_20_body">
      <style:text-properties fo:font-family="Times New Roman" fo:font-style="italic" fo:font-size="10.8pt"/>
    </style:style>
    <style:style style:name="font:times-new-roman:italic:1.0" style:family="text">
      <style:text-properties fo:font-family="Times New Roman" fo:font-style="italic" fo:font-size="12.0pt"/>
    </style:style>
    <style:style style:name="font:times-new-roman:italic:1.0:para" style:family="paragraph" style:parent-style-name="Text_20_body">
      <style:text-properties fo:font-family="Times New Roman" fo:font-style="italic" fo:font-size="12.0pt"/>
    </style:style>
    <style:style style:name="font:times-new-roman:italic:1.2" style:family="text">
      <style:text-properties fo:font-family="Times New Roman" fo:font-style="italic" fo:font-size="14.4pt"/>
    </style:style>
    <style:style style:name="font:times-new-roman:italic:1.2:para" style:family="paragraph" style:parent-style-name="Text_20_body">
      <style:text-properties fo:font-family="Times New Roman" fo:font-style="italic" fo:font-size="14.4pt"/>
    </style:style>
    <style:style style:name="font:times-new-roman:italic:1.44" style:family="text">
      <style:text-properties fo:font-family="Times New Roman" fo:font-style="italic" fo:font-size="17.3pt"/>
    </style:style>
    <style:style style:name="font:times-new-roman:italic:1.44:para" style:family="paragraph" style:parent-style-name="Text_20_body">
      <style:text-properties fo:font-family="Times New Roman" fo:font-style="italic" fo:font-size="17.3pt"/>
    </style:style>
    <style:style style:name="font:times-new-roman:italic:1.728" style:family="text">
      <style:text-properties fo:font-family="Times New Roman" fo:font-style="italic" fo:font-size="20.7pt"/>
    </style:style>
    <style:style style:name="font:times-new-roman:italic:1.728:para" style:family="paragraph" style:parent-style-name="Text_20_body">
      <style:text-properties fo:font-family="Times New Roman" fo:font-style="italic" fo:font-size="20.7pt"/>
    </style:style>
    <style:style style:name="font:times-new-roman:italic:2.074" style:family="text">
      <style:text-properties fo:font-family="Times New Roman" fo:font-style="italic" fo:font-size="24.9pt"/>
    </style:style>
    <style:style style:name="font:times-new-roman:italic:2.074:para" style:family="paragraph" style:parent-style-name="Text_20_body">
      <style:text-properties fo:font-family="Times New Roman" fo:font-style="italic" fo:font-size="24.9pt"/>
    </style:style>
    <style:style style:name="font:times-new-roman:italic:2.488" style:family="text">
      <style:text-properties fo:font-family="Times New Roman" fo:font-style="italic" fo:font-size="29.9pt"/>
    </style:style>
    <style:style style:name="font:times-new-roman:italic:2.488:para" style:family="paragraph" style:parent-style-name="Text_20_body">
      <style:text-properties fo:font-family="Times New Roman" fo:font-style="italic" fo:font-size="29.9pt"/>
    </style:style>
    <style:style style:name="font:times-new-roman:bold:0.6" style:family="text">
      <style:text-properties fo:font-family="Times New Roman" fo:font-weight="bold" fo:font-size="7.2pt"/>
    </style:style>
    <style:style style:name="font:times-new-roman:bold:0.6:para" style:family="paragraph" style:parent-style-name="Text_20_body">
      <style:text-properties fo:font-family="Times New Roman" fo:font-weight="bold" fo:font-size="7.2pt"/>
    </style:style>
    <style:style style:name="font:times-new-roman:bold:0.7" style:family="text">
      <style:text-properties fo:font-family="Times New Roman" fo:font-weight="bold" fo:font-size="8.4pt"/>
    </style:style>
    <style:style style:name="font:times-new-roman:bold:0.7:para" style:family="paragraph" style:parent-style-name="Text_20_body">
      <style:text-properties fo:font-family="Times New Roman" fo:font-weight="bold" fo:font-size="8.4pt"/>
    </style:style>
    <style:style style:name="font:times-new-roman:bold:0.8" style:family="text">
      <style:text-properties fo:font-family="Times New Roman" fo:font-weight="bold" fo:font-size="9.6pt"/>
    </style:style>
    <style:style style:name="font:times-new-roman:bold:0.8:para" style:family="paragraph" style:parent-style-name="Text_20_body">
      <style:text-properties fo:font-family="Times New Roman" fo:font-weight="bold" fo:font-size="9.6pt"/>
    </style:style>
    <style:style style:name="font:times-new-roman:bold:0.9" style:family="text">
      <style:text-properties fo:font-family="Times New Roman" fo:font-weight="bold" fo:font-size="10.8pt"/>
    </style:style>
    <style:style style:name="font:times-new-roman:bold:0.9:para" style:family="paragraph" style:parent-style-name="Text_20_body">
      <style:text-properties fo:font-family="Times New Roman" fo:font-weight="bold" fo:font-size="10.8pt"/>
    </style:style>
    <style:style style:name="font:times-new-roman:bold:1.0" style:family="text">
      <style:text-properties fo:font-family="Times New Roman" fo:font-weight="bold" fo:font-size="12.0pt"/>
    </style:style>
    <style:style style:name="font:times-new-roman:bold:1.0:para" style:family="paragraph" style:parent-style-name="Text_20_body">
      <style:text-properties fo:font-family="Times New Roman" fo:font-weight="bold" fo:font-size="12.0pt"/>
    </style:style>
    <style:style style:name="font:times-new-roman:bold:1.2" style:family="text">
      <style:text-properties fo:font-family="Times New Roman" fo:font-weight="bold" fo:font-size="14.4pt"/>
    </style:style>
    <style:style style:name="font:times-new-roman:bold:1.2:para" style:family="paragraph" style:parent-style-name="Text_20_body">
      <style:text-properties fo:font-family="Times New Roman" fo:font-weight="bold" fo:font-size="14.4pt"/>
    </style:style>
    <style:style style:name="font:times-new-roman:bold:1.44" style:family="text">
      <style:text-properties fo:font-family="Times New Roman" fo:font-weight="bold" fo:font-size="17.3pt"/>
    </style:style>
    <style:style style:name="font:times-new-roman:bold:1.44:para" style:family="paragraph" style:parent-style-name="Text_20_body">
      <style:text-properties fo:font-family="Times New Roman" fo:font-weight="bold" fo:font-size="17.3pt"/>
    </style:style>
    <style:style style:name="font:times-new-roman:bold:1.728" style:family="text">
      <style:text-properties fo:font-family="Times New Roman" fo:font-weight="bold" fo:font-size="20.7pt"/>
    </style:style>
    <style:style style:name="font:times-new-roman:bold:1.728:para" style:family="paragraph" style:parent-style-name="Text_20_body">
      <style:text-properties fo:font-family="Times New Roman" fo:font-weight="bold" fo:font-size="20.7pt"/>
    </style:style>
    <style:style style:name="font:times-new-roman:bold:2.074" style:family="text">
      <style:text-properties fo:font-family="Times New Roman" fo:font-weight="bold" fo:font-size="24.9pt"/>
    </style:style>
    <style:style style:name="font:times-new-roman:bold:2.074:para" style:family="paragraph" style:parent-style-name="Text_20_body">
      <style:text-properties fo:font-family="Times New Roman" fo:font-weight="bold" fo:font-size="24.9pt"/>
    </style:style>
    <style:style style:name="font:times-new-roman:bold:2.488" style:family="text">
      <style:text-properties fo:font-family="Times New Roman" fo:font-weight="bold" fo:font-size="29.9pt"/>
    </style:style>
    <style:style style:name="font:times-new-roman:bold:2.488:para" style:family="paragraph" style:parent-style-name="Text_20_body">
      <style:text-properties fo:font-family="Times New Roman" fo:font-weight="bold" fo:font-size="29.9pt"/>
    </style:style>
    <style:style style:name="font:times-new-roman:bold-italic:0.6" style:family="text">
      <style:text-properties fo:font-family="Times New Roman" fo:font-style="italic" fo:font-weight="bold" fo:font-size="7.2pt"/>
    </style:style>
    <style:style style:name="font:times-new-roman:bold-italic:0.6:para" style:family="paragraph" style:parent-style-name="Text_20_body">
      <style:text-properties fo:font-family="Times New Roman" fo:font-style="italic" fo:font-weight="bold" fo:font-size="7.2pt"/>
    </style:style>
    <style:style style:name="font:times-new-roman:bold-italic:0.7" style:family="text">
      <style:text-properties fo:font-family="Times New Roman" fo:font-style="italic" fo:font-weight="bold" fo:font-size="8.4pt"/>
    </style:style>
    <style:style style:name="font:times-new-roman:bold-italic:0.7:para" style:family="paragraph" style:parent-style-name="Text_20_body">
      <style:text-properties fo:font-family="Times New Roman" fo:font-style="italic" fo:font-weight="bold" fo:font-size="8.4pt"/>
    </style:style>
    <style:style style:name="font:times-new-roman:bold-italic:0.8" style:family="text">
      <style:text-properties fo:font-family="Times New Roman" fo:font-style="italic" fo:font-weight="bold" fo:font-size="9.6pt"/>
    </style:style>
    <style:style style:name="font:times-new-roman:bold-italic:0.8:para" style:family="paragraph" style:parent-style-name="Text_20_body">
      <style:text-properties fo:font-family="Times New Roman" fo:font-style="italic" fo:font-weight="bold" fo:font-size="9.6pt"/>
    </style:style>
    <style:style style:name="font:times-new-roman:bold-italic:0.9" style:family="text">
      <style:text-properties fo:font-family="Times New Roman" fo:font-style="italic" fo:font-weight="bold" fo:font-size="10.8pt"/>
    </style:style>
    <style:style style:name="font:times-new-roman:bold-italic:0.9:para" style:family="paragraph" style:parent-style-name="Text_20_body">
      <style:text-properties fo:font-family="Times New Roman" fo:font-style="italic" fo:font-weight="bold" fo:font-size="10.8pt"/>
    </style:style>
    <style:style style:name="font:times-new-roman:bold-italic:1.0" style:family="text">
      <style:text-properties fo:font-family="Times New Roman" fo:font-style="italic" fo:font-weight="bold" fo:font-size="12.0pt"/>
    </style:style>
    <style:style style:name="font:times-new-roman:bold-italic:1.0:para" style:family="paragraph" style:parent-style-name="Text_20_body">
      <style:text-properties fo:font-family="Times New Roman" fo:font-style="italic" fo:font-weight="bold" fo:font-size="12.0pt"/>
    </style:style>
    <style:style style:name="font:times-new-roman:bold-italic:1.2" style:family="text">
      <style:text-properties fo:font-family="Times New Roman" fo:font-style="italic" fo:font-weight="bold" fo:font-size="14.4pt"/>
    </style:style>
    <style:style style:name="font:times-new-roman:bold-italic:1.2:para" style:family="paragraph" style:parent-style-name="Text_20_body">
      <style:text-properties fo:font-family="Times New Roman" fo:font-style="italic" fo:font-weight="bold" fo:font-size="14.4pt"/>
    </style:style>
    <style:style style:name="font:times-new-roman:bold-italic:1.44" style:family="text">
      <style:text-properties fo:font-family="Times New Roman" fo:font-style="italic" fo:font-weight="bold" fo:font-size="17.3pt"/>
    </style:style>
    <style:style style:name="font:times-new-roman:bold-italic:1.44:para" style:family="paragraph" style:parent-style-name="Text_20_body">
      <style:text-properties fo:font-family="Times New Roman" fo:font-style="italic" fo:font-weight="bold" fo:font-size="17.3pt"/>
    </style:style>
    <style:style style:name="font:times-new-roman:bold-italic:1.728" style:family="text">
      <style:text-properties fo:font-family="Times New Roman" fo:font-style="italic" fo:font-weight="bold" fo:font-size="20.7pt"/>
    </style:style>
    <style:style style:name="font:times-new-roman:bold-italic:1.728:para" style:family="paragraph" style:parent-style-name="Text_20_body">
      <style:text-properties fo:font-family="Times New Roman" fo:font-style="italic" fo:font-weight="bold" fo:font-size="20.7pt"/>
    </style:style>
    <style:style style:name="font:times-new-roman:bold-italic:2.074" style:family="text">
      <style:text-properties fo:font-family="Times New Roman" fo:font-style="italic" fo:font-weight="bold" fo:font-size="24.9pt"/>
    </style:style>
    <style:style style:name="font:times-new-roman:bold-italic:2.074:para" style:family="paragraph" style:parent-style-name="Text_20_body">
      <style:text-properties fo:font-family="Times New Roman" fo:font-style="italic" fo:font-weight="bold" fo:font-size="24.9pt"/>
    </style:style>
    <style:style style:name="font:times-new-roman:bold-italic:2.488" style:family="text">
      <style:text-properties fo:font-family="Times New Roman" fo:font-style="italic" fo:font-weight="bold" fo:font-size="29.9pt"/>
    </style:style>
    <style:style style:name="font:times-new-roman:bold-italic:2.488:para" style:family="paragraph" style:parent-style-name="Text_20_body">
      <style:text-properties fo:font-family="Times New Roman" fo:font-style="italic" fo:font-weight="bold" fo:font-size="29.9pt"/>
    </style:style>
    <style:style style:name="Pagebreak" style:family="paragraph" style:parent-style-name="Text_20_body">
      <style:paragraph-properties fo:break-before="page"/>
    </style:style>
    <style:style style:name="Quote" style:family="paragraph" style:parent-style-name="Text_20_body" style:next-style-name="Text_20_body">
      <style:paragraph-properties fo:margin-left="0.75in" fo:margin-right="0.75in" fo:margin-top="0.04in" fo:margin-bottom="0.04in"/>
    </style:style>
    <style:style style:name="Rule" style:family="paragraph" style:parent-style-name="Text_20_body" style:next-style-name="Text_20_body">
      <style:paragraph-properties fo:margin-top="0.04in" fo:margin-bottom="0.04in" fo:border-bottom="0.01in solid #999999"/>
      <style:text-properties fo:font-size="1pt"/>
    </style:style>
    <style:style style:name="SceneBreak" style:family="paragraph" style:parent-style-name="Text_20_body" style:next-style-name="Text_20_body">
      <style:paragraph-properties fo:text-align="center" fo:margin-top="0.08in" fo:margin-bottom="0.08in"/>
    </style:style>
    <style:style style:name="Source" style:family="paragraph" style:parent-style-name="Text_20_body" style:next-style-name="Text_20_body">
      <style:paragraph-properties fo:text-align="end" fo:margin-right="0.75in" fo:margin-top="0.02in" fo:margin-bottom="0.06in"/>
      <style:text-properties fo:font-size="10pt"/>
    </style:style>
    <style:style style:name="VspaceTiny" style:family="paragraph" style:parent-style-name="Text_20_body">
      <style:paragraph-properties fo:margin-top="0.08in" fo:margin-bottom="0in"/>
      <style:text-properties fo:font-size="1pt"/>
    </style:style>
    <style:style style:name="VspaceSmall" style:family="paragraph" style:parent-style-name="Text_20_body">
      <style:paragraph-properties fo:margin-top="0.17in" fo:margin-bottom="0in"/>
      <style:text-properties fo:font-size="1pt"/>
    </style:style>
    <style:style style:name="VspaceMedium" style:family="paragraph" style:parent-style-name="Text_20_body">
      <style:paragraph-properties fo:margin-top="0.33in" fo:margin-bottom="0in"/>
      <style:text-properties fo:font-size="1pt"/>
    </style:style>
    <style:style style:name="VspaceLarge" style:family="paragraph" style:parent-style-name="Text_20_body">
      <style:paragraph-properties fo:margin-top="0.67in" fo:margin-bottom="0in"/>
      <style:text-properties fo:font-size="1pt"/>
    </style:style>
    <style:style style:name="VspaceHuge" style:family="paragraph" style:parent-style-name="Text_20_body">
      <style:paragraph-properties fo:margin-top="1.33in" fo:margin-bottom="0in"/>
      <style:text-properties fo:font-size="1pt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